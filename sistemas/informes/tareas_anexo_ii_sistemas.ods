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10.005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5.642cm"/>
    </style:style>
    <style:style style:name="co4" style:family="table-column">
      <style:table-column-properties fo:break-before="auto" style:column-width="23.19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4.4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 table:null-year="1950"/>
      <table:table table:name="tareas_anexo_ii_sistem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6377" table:default-cell-style-name="ce1"/>
        <table:table-row table:style-name="ro1">
          <table:table-cell office:value-type="string" calcext:value-type="string">
            <text:p>PROYECTO (GRUPO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BRE DEL SUBPROYECTO</text:p>
          </table:table-cell>
          <table:table-cell office:value-type="string" calcext:value-type="string">
            <text:p>desc_empresa_n</text:p>
          </table:table-cell>
          <table:table-cell office:value-type="string" calcext:value-type="string">
            <text:p>val_empresa_n</text:p>
          </table:table-cell>
          <table:table-cell office:value-type="string" calcext:value-type="string">
            <text:p>desc_empresa_s</text:p>
          </table:table-cell>
          <table:table-cell office:value-type="string" calcext:value-type="string">
            <text:p>val_empresa_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tenimiento y mejora de entornos de Bases de Datos (BD)</text:p>
          </table:table-cell>
          <table:table-cell office:value-type="string" calcext:value-type="string">
            <text:p>BD1</text:p>
          </table:table-cell>
          <table:table-cell office:value-type="string" calcext:value-type="string">
            <text:p>Mantenimiento y mejora de entornos de Bases de Datos MariaDB y Proxy SQL avanzado</text:p>
          </table:table-cell>
          <table:table-cell office:value-type="string" calcext:value-type="string">
            <text:p>Revisión genérica de servidores y balanceo sin replicación ni ProxySQL avanzad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itoriza clusters y replicación; incluye ProxySQL y ClusterControl aunque faltan umbrale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tenimiento y mejora de entornos de Bases de Datos (BD)</text:p>
          </table:table-cell>
          <table:table-cell office:value-type="string" calcext:value-type="string">
            <text:p>BD2</text:p>
          </table:table-cell>
          <table:table-cell office:value-type="string" calcext:value-type="string">
            <text:p>Mantenimiento y optimización proactiva de las bases de datos de toda la plataforma</text:p>
          </table:table-cell>
          <table:table-cell office:value-type="string" calcext:value-type="string">
            <text:p>Revisa consultas y copias sin métricas ni estrategia para miles de base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automatización de consultas copias y seguridad adaptada a miles de base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tenimiento y mejora de entornos de Bases de Datos (BD)</text:p>
          </table:table-cell>
          <table:table-cell office:value-type="string" calcext:value-type="string">
            <text:p>BD3</text:p>
          </table:table-cell>
          <table:table-cell office:value-type="string" calcext:value-type="string">
            <text:p>Mantenimiento de las diferentes Bases de Datos de gestión de la configuración de EducaMadrid</text:p>
          </table:table-cell>
          <table:table-cell office:value-type="string" calcext:value-type="string">
            <text:p>Actualiza registros sin descubrimiento automático ni modelo de dependencia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oluciona la CMDB con ETL Ansible y controles de calidad del dat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tenimiento y mejora de entornos de Bases de Datos (BD)</text:p>
          </table:table-cell>
          <table:table-cell office:value-type="string" calcext:value-type="string">
            <text:p>BD4</text:p>
          </table:table-cell>
          <table:table-cell office:value-type="string" calcext:value-type="string">
            <text:p>Mantenimiento de las bases de datos de las Aulas Virtuales</text:p>
          </table:table-cell>
          <table:table-cell office:value-type="string" calcext:value-type="string">
            <text:p>Controla carga de forma genérica sin herramientas ni estrategia de redistribución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tuning PostgreSQL redistribución de carga y copias automatizada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tenimiento y mejora de entornos de Bases de Datos (BD)</text:p>
          </table:table-cell>
          <table:table-cell office:value-type="string" calcext:value-type="string">
            <text:p>BD5</text:p>
          </table:table-cell>
          <table:table-cell office:value-type="string" calcext:value-type="string">
            <text:p>Mantenimiento de disparadores y Foreign Data Wrappers en los entornos “Portal” y “LDAP Plano”</text:p>
          </table:table-cell>
          <table:table-cell office:value-type="string" calcext:value-type="string">
            <text:p>Comprueba triggers y conectividad sin sincronización ni validación de dat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miza triggers y FDW con scripts de sincronización y alertas de desincronización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tenimiento y mejora de entornos de Bases de Datos (BD)</text:p>
          </table:table-cell>
          <table:table-cell office:value-type="string" calcext:value-type="string">
            <text:p>BD6</text:p>
          </table:table-cell>
          <table:table-cell office:value-type="string" calcext:value-type="string">
            <text:p>Implementación y Mantenimiento de las Bases de Datos necesarias en entornos de Microservicios</text:p>
          </table:table-cell>
          <table:table-cell office:value-type="string" calcext:value-type="string">
            <text:p>Plantea instalación y mantenimiento tradicional sin contenedores ni automatización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uye Docker CI/CD persistencia y validación previa a producción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nitorización, testeo y pruebas de rendimiento (MON)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antenimiento periódico del almacenamiento de los centros</text:p>
          </table:table-cell>
          <table:table-cell office:value-type="string" calcext:value-type="string">
            <text:p>Revisa ocupación y mueve datos sin criterios métricas ni automatización NF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ntea monitorización de capacidad balanceo y migraciones controladas con planificación predictiv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nitorización, testeo y pruebas de rendimiento (MON)</text:p>
          </table:table-cell>
          <table:table-cell office:value-type="string" calcext:value-type="string">
            <text:p>MON2</text:p>
          </table:table-cell>
          <table:table-cell office:value-type="string" calcext:value-type="string">
            <text:p>Realización periódica de pruebas de estrés en diferentes entornos de la plataforma</text:p>
          </table:table-cell>
          <table:table-cell office:value-type="string" calcext:value-type="string">
            <text:p>Menciona pruebas de carga sin herramientas escenarios ni metodología de análisi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a JMeter Gatling y Apache Benchmark con escenarios y análisis de cuellos de botell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nitorización, testeo y pruebas de rendimiento (MON)</text:p>
          </table:table-cell>
          <table:table-cell office:value-type="string" calcext:value-type="string">
            <text:p>MON3</text:p>
          </table:table-cell>
          <table:table-cell office:value-type="string" calcext:value-type="string">
            <text:p>Mantener actualizado el sistema de monitorización y estadísticas de uso</text:p>
          </table:table-cell>
          <table:table-cell office:value-type="string" calcext:value-type="string">
            <text:p>Incorpora sistemas y alertas sin arquitectura herramientas ni métricas definida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Prometheus Grafana Zabbix y Metabase con exporters y alertad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nitorización, testeo y pruebas de rendimiento (MON)</text:p>
          </table:table-cell>
          <table:table-cell office:value-type="string" calcext:value-type="string">
            <text:p>MON4</text:p>
          </table:table-cell>
          <table:table-cell office:value-type="string" calcext:value-type="string">
            <text:p>Mantener actualizado el sistema de monitorización y estadísticas de servicios basados en IA</text:p>
          </table:table-cell>
          <table:table-cell office:value-type="string" calcext:value-type="string">
            <text:p>Propone monitorización general sin métricas ni alertas específicas de I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ra métricas de IA sobre rendimiento consumo sesgos y trazabilidad de consulta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1</text:p>
          </table:table-cell>
          <table:table-cell office:value-type="string" calcext:value-type="string">
            <text:p>Mantenimiento y mejora de los sistemas de videoconferencias de EducaMadrid</text:p>
          </table:table-cell>
          <table:table-cell office:value-type="string" calcext:value-type="string">
            <text:p>Instala versiones y valida compatibilidad sin abordar escalabilidad ni concurrenci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ine arquitectura Jitsi y BigBlueButton con balanceo y métricas de calidad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2</text:p>
          </table:table-cell>
          <table:table-cell office:value-type="string" calcext:value-type="string">
            <text:p>Mantenimiento y mejora del sistema secundario de Videoconferencias con opción de grabación</text:p>
          </table:table-cell>
          <table:table-cell office:value-type="string" calcext:value-type="string">
            <text:p>Mantiene un enfoque genérico sin tratar grabación almacenamiento ni BigBlueButton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nodos separados de grabación pero concreta poco almacenamiento y retención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3</text:p>
          </table:table-cell>
          <table:table-cell office:value-type="string" calcext:value-type="string">
            <text:p>Mantenimiento y mejora de la herramienta Mattermost</text:p>
          </table:table-cell>
          <table:table-cell office:value-type="string" calcext:value-type="string">
            <text:p>Describe actualización general sin LDAP bases de datos ni alta disponibilidad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ra Mattermost con LDAP y SSO en una arquitectura contenerizad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4</text:p>
          </table:table-cell>
          <table:table-cell office:value-type="string" calcext:value-type="string">
            <text:p>Mantenimiento y mejora de la solución Kanban</text:p>
          </table:table-cell>
          <table:table-cell office:value-type="string" calcext:value-type="string">
            <text:p>Describe actualización e incidencias sin identificar herramienta ni automatizacione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tiene Wekan mediante versiones estables, migraciones controladas, preproducción, reversión, contenedores y plantillas de fluj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5</text:p>
          </table:table-cell>
          <table:table-cell office:value-type="string" calcext:value-type="string">
            <text:p>Mantenimiento y mejora de la solución GitLab</text:p>
          </table:table-cell>
          <table:table-cell office:value-type="string" calcext:value-type="string">
            <text:p>Menciona mantenimiento sin desarrollar repositorios pipelines ni seguridad específic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ra GitLab con repositorios CI/CD y control de calidad del desarroll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6</text:p>
          </table:table-cell>
          <table:table-cell office:value-type="string" calcext:value-type="string">
            <text:p>Mantenimiento y mejora de la solución LimeSurvey</text:p>
          </table:table-cell>
          <table:table-cell office:value-type="string" calcext:value-type="string">
            <text:p>Propone tareas generales sin desarrollar componentes ni procedimientos específico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luye el mantenimiento general de la herramienta pero con detalle funcional limitado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7</text:p>
          </table:table-cell>
          <table:table-cell office:value-type="string" calcext:value-type="string">
            <text:p>Mantenimiento y mejora de SonarQube</text:p>
          </table:table-cell>
          <table:table-cell office:value-type="string" calcext:value-type="string">
            <text:p>Menciona actualización sin métricas de calidad ni integración con desarroll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ra SonarQube en CI/CD aunque sin definir reglas ni métricas concreta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8</text:p>
          </table:table-cell>
          <table:table-cell office:value-type="string" calcext:value-type="string">
            <text:p>Mantenimiento y mejora de Redmine</text:p>
          </table:table-cell>
          <table:table-cell office:value-type="string" calcext:value-type="string">
            <text:p>Describe Redmine con detalle operativo y mejoras funcionales concreta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gra Redmine en la gestión de proyectos y flujos de trabaj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9</text:p>
          </table:table-cell>
          <table:table-cell office:value-type="string" calcext:value-type="string">
            <text:p>Mantenimiento y configuración de Wowza Streaming Engine.</text:p>
          </table:table-cell>
          <table:table-cell office:value-type="string" calcext:value-type="string">
            <text:p>Menciona mantenimiento sin arquitectura streaming ni métricas de servici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ribe operación de Wowza con configuración y monitorización de streaming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10</text:p>
          </table:table-cell>
          <table:table-cell office:value-type="string" calcext:value-type="string">
            <text:p>Mantenimiento y gestión de contenidos AbiesWeb</text:p>
          </table:table-cell>
          <table:table-cell office:value-type="string" calcext:value-type="string">
            <text:p>Incluye mantenimiento y contenidos de forma genérica sin procesos detallad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gestión de contenidos AbiesWeb pero sin procedimientos operativos específicos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11</text:p>
          </table:table-cell>
          <table:table-cell office:value-type="string" calcext:value-type="string">
            <text:p>Actualización, Mantenimiento y gestión de contenidos de Abies+</text:p>
          </table:table-cell>
          <table:table-cell office:value-type="string" calcext:value-type="string">
            <text:p>Describe tareas generales sin adaptar la propuesta a las particularidades de Abies+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mensiona Abies+ en desarrollo, preproducción y producción, con base de datos optimizada, alta disponibilidad, copias e integración Keycloak o LDAP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12</text:p>
          </table:table-cell>
          <table:table-cell office:value-type="string" calcext:value-type="string">
            <text:p>Implementación, mantenimiento y mejora de Empieza</text:p>
          </table:table-cell>
          <table:table-cell office:value-type="string" calcext:value-type="string">
            <text:p>Menciona implantación y mantenimiento sin arquitectura ni evolución funcional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one integración y evolución de Empieza aunque con detalle técnico limitad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13</text:p>
          </table:table-cell>
          <table:table-cell office:value-type="string" calcext:value-type="string">
            <text:p>mantenimiento y mejora del sistema de gestión de la configuración</text:p>
          </table:table-cell>
          <table:table-cell office:value-type="string" calcext:value-type="string">
            <text:p>Se limita a revisión y actualización sin automatización ni modelo técnic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one CMDB y automatización de configuración aunque sin herramienta concret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14</text:p>
          </table:table-cell>
          <table:table-cell office:value-type="string" calcext:value-type="string">
            <text:p>Mantenimiento, Actualización y mejora de la solución de contenedores</text:p>
          </table:table-cell>
          <table:table-cell office:value-type="string" calcext:value-type="string">
            <text:p>Menciona actualizaciones sin orquestación ni arquitectura de contenedore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luye Docker y despliegues pero no define orquestación ni alta disponibilidad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ción de servicios existentes (UPD)</text:p>
          </table:table-cell>
          <table:table-cell office:value-type="string" calcext:value-type="string">
            <text:p>UPD15</text:p>
          </table:table-cell>
          <table:table-cell office:value-type="string" calcext:value-type="string">
            <text:p>Mantenimiento de gestión y decomisionado de servidores</text:p>
          </table:table-cell>
          <table:table-cell office:value-type="string" calcext:value-type="string">
            <text:p>Describe bajas y mantenimiento sin procedimientos de desmantelamiento verificable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mpla gestión del ciclo de vida de servidores con detalle operativo limitado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loud (CLO)</text:p>
          </table:table-cell>
          <table:table-cell office:value-type="string" calcext:value-type="string">
            <text:p>CLO1</text:p>
          </table:table-cell>
          <table:table-cell office:value-type="string" calcext:value-type="string">
            <text:p>Mantenimiento del servicio de la nube de EducaMadrid</text:p>
          </table:table-cell>
          <table:table-cell office:value-type="string" calcext:value-type="string">
            <text:p>Aborda la nube de forma general sin arquitectura ni automatización específic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one operación cloud con automatización y monitorización aunque sin arquitectura detallad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loud (CLO)</text:p>
          </table:table-cell>
          <table:table-cell office:value-type="string" calcext:value-type="string">
            <text:p>CLO2</text:p>
          </table:table-cell>
          <table:table-cell office:value-type="string" calcext:value-type="string">
            <text:p>Mantenimiento y adaptación del sistema de almacenamiento temporal de datos de la nube</text:p>
          </table:table-cell>
          <table:table-cell office:value-type="string" calcext:value-type="string">
            <text:p>Menciona almacenamiento temporal sin políticas ni mecanismos de contro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be almacenamiento temporal y gestión de espacio con concreción parcial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loud (CLO)</text:p>
          </table:table-cell>
          <table:table-cell office:value-type="string" calcext:value-type="string">
            <text:p>CLO3</text:p>
          </table:table-cell>
          <table:table-cell office:value-type="string" calcext:value-type="string">
            <text:p>Mantenimiento del sistema de edición en línea de EducaMadrid</text:p>
          </table:table-cell>
          <table:table-cell office:value-type="string" calcext:value-type="string">
            <text:p>Propone mantenimiento genérico sin integración ni requisitos de edición colaborativ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luye operación del editor en línea e integración con la plataform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desarrollos (OTR)</text:p>
          </table:table-cell>
          <table:table-cell office:value-type="string" calcext:value-type="string">
            <text:p>OTR1</text:p>
          </table:table-cell>
          <table:table-cell office:value-type="string" calcext:value-type="string">
            <text:p>Mantenimiento y mejora del sistema de autentificación centralizada Single Sign On (SSO)</text:p>
          </table:table-cell>
          <table:table-cell office:value-type="string" calcext:value-type="string">
            <text:p>Mantiene Keycloak con sincronización LDAP, nodos redundantes, balanceo, replicación de sesiones y 2FA; faltan dimensionamiento y métrica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ne SSO integrado y control de acceso con un planteamiento coherente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desarrollos (OTR)</text:p>
          </table:table-cell>
          <table:table-cell office:value-type="string" calcext:value-type="string">
            <text:p>OTR2</text:p>
          </table:table-cell>
          <table:table-cell office:value-type="string" calcext:value-type="string">
            <text:p>Mantenimiento, configuración y gestión 2FA en el servicio de Single Sign On (SSO)</text:p>
          </table:table-cell>
          <table:table-cell office:value-type="string" calcext:value-type="string">
            <text:p>Menciona 2FA sin flujos de enrolamiento ni mecanismos de gestión detallad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empla 2FA en SSO pero sin detallar enrolamiento ni recuperación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desarrollos (OTR)</text:p>
          </table:table-cell>
          <table:table-cell office:value-type="string" calcext:value-type="string">
            <text:p>OTR3</text:p>
          </table:table-cell>
          <table:table-cell office:value-type="string" calcext:value-type="string">
            <text:p>Mantenimiento y mejora de herramientas de automatización de tareas</text:p>
          </table:table-cell>
          <table:table-cell office:value-type="string" calcext:value-type="string">
            <text:p>Propone automatización genérica sin herramientas ni control de ejecucione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Ansible y CI/CD para automatización y despliegue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desarrollos (OTR)</text:p>
          </table:table-cell>
          <table:table-cell office:value-type="string" calcext:value-type="string">
            <text:p>OTR4</text:p>
          </table:table-cell>
          <table:table-cell office:value-type="string" calcext:value-type="string">
            <text:p>Mantenimiento y mejora de un sistema de gestión y análisis de datos mediante el stack de Elastic</text:p>
          </table:table-cell>
          <table:table-cell office:value-type="string" calcext:value-type="string">
            <text:p>Menciona Elastic sin arquitectura de ingestión ni analítica detallad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uye Elastic para análisis y visualización aunque con desarrollo parcial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desarrollos (OTR)</text:p>
          </table:table-cell>
          <table:table-cell office:value-type="string" calcext:value-type="string">
            <text:p>OTR5</text:p>
          </table:table-cell>
          <table:table-cell office:value-type="string" calcext:value-type="string">
            <text:p>Mantenimiento y mejora de la herramienta de flujos de trabajo</text:p>
          </table:table-cell>
          <table:table-cell office:value-type="string" calcext:value-type="string">
            <text:p>Describe flujos de trabajo sin identificar herramienta ni automatizacione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tiene una plataforma de flujos con base dedicada, automatización, trazabilidad e integración con GitLab, CMDB, monitorización y SS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desarrollos (OTR)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Mantenimiento y mejora del Portal CAU</text:p>
          </table:table-cell>
          <table:table-cell office:value-type="string" calcext:value-type="string">
            <text:p>Plantea mantenimiento del portal sin funcionalidades ni arquitectura específica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mantenimiento del Portal CAU dentro del modelo de atención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desarrollos (OTR)</text:p>
          </table:table-cell>
          <table:table-cell office:value-type="string" calcext:value-type="string">
            <text:p>OTR7</text:p>
          </table:table-cell>
          <table:table-cell office:value-type="string" calcext:value-type="string">
            <text:p>Mantenimiento y evolución de servicios de Inteligencia Artificial para la plataforma EducaMadrid</text:p>
          </table:table-cell>
          <table:table-cell office:value-type="string" calcext:value-type="string">
            <text:p>Menciona IA de forma general sin arquitectura ni procesos de operación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ra IA en servicios y automatización con gobierno y trazabilidad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1</text:p>
          </table:table-cell>
          <table:table-cell office:value-type="string" calcext:value-type="string">
            <text:p>Mantenimiento y mejora de los sistemas de control de envíos de correo</text:p>
          </table:table-cell>
          <table:table-cell office:value-type="string" calcext:value-type="string">
            <text:p>Describe control de envíos sin métricas ni procedimientos de operación avanzad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control de envíos y monitorización aunque sin indicadores cuantificados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Mantenimiento automatizado de listas de distribución de EducaMadrid</text:p>
          </table:table-cell>
          <table:table-cell office:value-type="string" calcext:value-type="string">
            <text:p>Menciona listas sin automatización detallada ni integración con directori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empla automatización de listas con definición operativa limitada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3</text:p>
          </table:table-cell>
          <table:table-cell office:value-type="string" calcext:value-type="string">
            <text:p>Mantenimiento y mejora del sistema de activación y gestión de cuotas de correo</text:p>
          </table:table-cell>
          <table:table-cell office:value-type="string" calcext:value-type="string">
            <text:p>Describe cuotas de forma genérica sin reglas ni controles automatizad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gestión de cuotas y seguimiento aunque sin políticas detalladas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4</text:p>
          </table:table-cell>
          <table:table-cell office:value-type="string" calcext:value-type="string">
            <text:p>Mantenimiento y mejora de las herramientas relacionadas con el control del spam</text:p>
          </table:table-cell>
          <table:table-cell office:value-type="string" calcext:value-type="string">
            <text:p>Menciona antispam sin herramientas reglas ni análisis de efectividad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uye control antispam y actualización de reglas con concreción parcial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5</text:p>
          </table:table-cell>
          <table:table-cell office:value-type="string" calcext:value-type="string">
            <text:p>Mantenimiento de buzones de correo</text:p>
          </table:table-cell>
          <table:table-cell office:value-type="string" calcext:value-type="string">
            <text:p>Propone mantenimiento de buzones sin procesos ni automatización específic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be gestión de buzones con enfoque de operación y soporte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6</text:p>
          </table:table-cell>
          <table:table-cell office:value-type="string" calcext:value-type="string">
            <text:p>Mantenimiento y mejora continua de la seguridad del sistema de correo</text:p>
          </table:table-cell>
          <table:table-cell office:value-type="string" calcext:value-type="string">
            <text:p>Menciona seguridad sin controles técnicos ni procedimientos verificable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endurecimiento y controles de seguridad del corre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7</text:p>
          </table:table-cell>
          <table:table-cell office:value-type="string" calcext:value-type="string">
            <text:p>Actualización y mejora continua de la infraestructura en la que se basa el sistema de correo</text:p>
          </table:table-cell>
          <table:table-cell office:value-type="string" calcext:value-type="string">
            <text:p>Describe actualizaciones generales sin plan de evolución ni métrica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empla evolución de infraestructura con detalle técnico limitado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8</text:p>
          </table:table-cell>
          <table:table-cell office:value-type="string" calcext:value-type="string">
            <text:p>Ampliación del número de servidores Mailbox Server</text:p>
          </table:table-cell>
          <table:table-cell office:value-type="string" calcext:value-type="string">
            <text:p>Menciona ampliación de servidores sin arquitectura ni procedimiento de escalad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ampliación de Mailbox Server sin diseño de capacidad detallado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9</text:p>
          </table:table-cell>
          <table:table-cell office:value-type="string" calcext:value-type="string">
            <text:p>Implementación y mejora de un módulo receptor de inyección directa para la infraestructura de transporte de correo</text:p>
          </table:table-cell>
          <table:table-cell office:value-type="string" calcext:value-type="string">
            <text:p>Describe el módulo de forma genérica sin arquitectura ni controles técnic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lementa inyección directa mediante QMQP y qmqpd, escritura atómica en spool, coexistencia SMTP, escalado y despliegue reversible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eo electrónico (COR)</text:p>
          </table:table-cell>
          <table:table-cell office:value-type="string" calcext:value-type="string">
            <text:p>COR10</text:p>
          </table:table-cell>
          <table:table-cell office:value-type="string" calcext:value-type="string">
            <text:p>Mantenimiento y soporte del módulo de inyección directa de correo</text:p>
          </table:table-cell>
          <table:table-cell office:value-type="string" calcext:value-type="string">
            <text:p>Menciona soporte sin herramientas ni métricas de funcionamiento del módul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tiene qmqpd con control de integridad y back-pressure, pruebas de carga, resiliencia y coexistencia, rollback y documentación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1</text:p>
          </table:table-cell>
          <table:table-cell office:value-type="string" calcext:value-type="string">
            <text:p>Mantenimiento y actualización de MAX de forma presencial en centros de forma regular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nifica intervenciones presenciales, actualización y parcheado, compatibilidad de periféricos, imágenes certificadas y diagnóstico remot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2</text:p>
          </table:table-cell>
          <table:table-cell office:value-type="string" calcext:value-type="string">
            <text:p>Mantenimiento y actualización del servidor MAX para el desarrollo de distribuciones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stiona entornos de construcción legacy y actual con CI/CD, builds reproducibles en contenedores, versionado y repositorios propio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3</text:p>
          </table:table-cell>
          <table:table-cell office:value-type="string" calcext:value-type="string">
            <text:p>Mantenimiento de aplicaciones basadas en MAX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rola código, compilación, dependencias y parcheado de aplicaciones MAX, con preproducción, certificación y seguimiento de vulnerabilidade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4</text:p>
          </table:table-cell>
          <table:table-cell office:value-type="string" calcext:value-type="string">
            <text:p>Lanzamiento de distribuciones de MAX “Full Equip” anualmente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ructura Full Equip en definición, construcción y validación, con pipeline, pruebas funcionales, compatibilidad y trazabilidad de build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5</text:p>
          </table:table-cell>
          <table:table-cell office:value-type="string" calcext:value-type="string">
            <text:p>Lanzamiento de distribuciones de “MAX lite” y/o “max gestión” anualmente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ferencia MAX Lite y MAX Gestión, adaptadas a perfiles y hardware, con modularidad y optimización de rendimient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6</text:p>
          </table:table-cell>
          <table:table-cell office:value-type="string" calcext:value-type="string">
            <text:p>Integración de aplicaciones externas a los repositorios oficiales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iza compatibilidad y seguridad, empaqueta y publica aplicaciones externas con catálogo, pruebas y seguimiento de CVE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7</text:p>
          </table:table-cell>
          <table:table-cell office:value-type="string" calcext:value-type="string">
            <text:p>Mantenimiento y mejora del servidor de gestión accesos remotos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orciona acceso remoto centralizado con roles, cifrado, registro de sesiones, monitorización y trazabilidad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8</text:p>
          </table:table-cell>
          <table:table-cell office:value-type="string" calcext:value-type="string">
            <text:p>Soporte de asistencia telefónica y remota para incidencias de entornos MAX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bina soporte telefónico y remoto con registro, clasificación, base de conocimiento, priorización y métricas de resolución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9</text:p>
          </table:table-cell>
          <table:table-cell office:value-type="string" calcext:value-type="string">
            <text:p>Asistencia presencial en los diferentes eventos MAX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nifica la asistencia a eventos, coordina recursos, resuelve incidencias in situ y reutiliza resultados en la base de conocimient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10</text:p>
          </table:table-cell>
          <table:table-cell office:value-type="string" calcext:value-type="string">
            <text:p>Soporte presencial en eventos especiales (MAX Install Party)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ara Install Party con imágenes, scripts y repositorios locales para instalaciones masivas y transferencia de conocimient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11</text:p>
          </table:table-cell>
          <table:table-cell office:value-type="string" calcext:value-type="string">
            <text:p>Gestión, mantenimiento y actualización de equipos MAX en remoto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ventaría equipos y despliega actualizaciones y parches mediante gestión remota centralizada y monitorización continu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12</text:p>
          </table:table-cell>
          <table:table-cell office:value-type="string" calcext:value-type="string">
            <text:p>Instalación y configuración de dispositivos solicitadas por los centros educativos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a compatibilidad, instala controladores y prueba periféricos, con catálogo de dispositivos y scripts de instalación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13</text:p>
          </table:table-cell>
          <table:table-cell office:value-type="string" calcext:value-type="string">
            <text:p>Mantenimiento y soporte del servidor de repositorio individual para centros educativos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tiene repositorios Migasfree multicentro con inventario, paquetes, versiones, políticas automatizadas y auditorí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stema Operativo MAX (MAX)</text:p>
          </table:table-cell>
          <table:table-cell office:value-type="string" calcext:value-type="string">
            <text:p>MAX14</text:p>
          </table:table-cell>
          <table:table-cell office:value-type="string" calcext:value-type="string">
            <text:p>Herramienta de gestión centralizada de maquetas de MAX</text:p>
          </table:table-cell>
          <table:table-cell office:value-type="string" calcext:value-type="string">
            <text:p>No aporta contenido técnico evaluable específico para el bloque MAX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stiona maquetas versionadas mediante Migasfree, agentes, políticas, despliegues automáticos y control de cumplimient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1</text:p>
          </table:table-cell>
          <table:table-cell office:value-type="string" calcext:value-type="string">
            <text:p>Actualización y comprobación periódicas de servidores físicos y virtuales de BBDD de los entornos de aulas virtuales</text:p>
          </table:table-cell>
          <table:table-cell office:value-type="string" calcext:value-type="string">
            <text:p>Revisa servidores de BBDD sin diagnóstico ni estrategia para alta concurrenci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utiliza el enfoque de BBDD y monitorización sin desarrollo específico de aulas virtuale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2</text:p>
          </table:table-cell>
          <table:table-cell office:value-type="string" calcext:value-type="string">
            <text:p>Mantenimiento de los servidores virtuales FrontEnd de los entornos de aulas virtuales</text:p>
          </table:table-cell>
          <table:table-cell office:value-type="string" calcext:value-type="string">
            <text:p>Describe supervisión sin balanceo escalabilidad ni gestión de tráfic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mantenimiento de FrontEnd con concreción limitada en escalabilidad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3</text:p>
          </table:table-cell>
          <table:table-cell office:value-type="string" calcext:value-type="string">
            <text:p>Despliegue periódico de nuevos grupos de aulas virtuales y ampliación de los actuales</text:p>
          </table:table-cell>
          <table:table-cell office:value-type="string" calcext:value-type="string">
            <text:p>Menciona nuevos entornos sin automatización ni secuencias de despliegue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empla despliegues y ampliaciones pero sin procedimiento detallado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las Virtuales (AV)</text:p>
          </table:table-cell>
          <table:table-cell office:value-type="string" calcext:value-type="string">
            <text:p>AV4</text:p>
          </table:table-cell>
          <table:table-cell office:value-type="string" calcext:value-type="string">
            <text:p>Redistribución periódica de los NFS de datos de las aulas virtuales</text:p>
          </table:table-cell>
          <table:table-cell office:value-type="string" calcext:value-type="string">
            <text:p>Revisa ocupación NFS sin métricas ni procedimientos de migración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redistribución y capacidad NFS con monitorización y validacione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vicio de LDAP y Portal Educativo (POR)</text:p>
          </table:table-cell>
          <table:table-cell office:value-type="string" calcext:value-type="string">
            <text:p>POR1</text:p>
          </table:table-cell>
          <table:table-cell office:value-type="string" calcext:value-type="string">
            <text:p>Ampliación periódica del sistema de esclavos LDAP de EducaMadrid</text:p>
          </table:table-cell>
          <table:table-cell office:value-type="string" calcext:value-type="string">
            <text:p>Propone nuevos servidores sin replicación ni control de divergencias LDA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empla ampliación de esclavos LDAP pero sin procedimientos de replicación detallados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vicio de LDAP y Portal Educativo (POR)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igración del sistema LDAP máster de EducaMadrid</text:p>
          </table:table-cell>
          <table:table-cell office:value-type="string" calcext:value-type="string">
            <text:p>Menciona migración y revisión sin fases ni validación de consistenci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gra LDAP Master a un entorno virtualizado con LDAPS, importación controlada, replicación, alta disponibilidad, preproducción y copia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1</text:p>
          </table:table-cell>
          <table:table-cell office:value-type="string" calcext:value-type="string">
            <text:p>Mantenimiento y mejora del sistema de control de cambios en DNS</text:p>
          </table:table-cell>
          <table:table-cell office:value-type="string" calcext:value-type="string">
            <text:p>Revisa DNS sin versionado auditoría ni flujos de aprobación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control de cambios DNS con trazabilidad operativa parcial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2</text:p>
          </table:table-cell>
          <table:table-cell office:value-type="string" calcext:value-type="string">
            <text:p>Mantenimiento y mejora de un LDAP Máster independiente para usuarios privilegiados</text:p>
          </table:table-cell>
          <table:table-cell office:value-type="string" calcext:value-type="string">
            <text:p>Describe gestión general sin arquitectura segregada ni controles de privilegi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LDAP de privilegiados con segmentación y controles de acceso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3</text:p>
          </table:table-cell>
          <table:table-cell office:value-type="string" calcext:value-type="string">
            <text:p>Gestión, mantenimiento e implantación anual de los certificados de EducaMadrid</text:p>
          </table:table-cell>
          <table:table-cell office:value-type="string" calcext:value-type="string">
            <text:p>Menciona certificados sin automatización ni gestión del ciclo de vid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empla el ciclo de certificados con procesos de gestión parcialmente definidos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4</text:p>
          </table:table-cell>
          <table:table-cell office:value-type="string" calcext:value-type="string">
            <text:p>Gestión y mantenimiento periódico de dominios DNS</text:p>
          </table:table-cell>
          <table:table-cell office:value-type="string" calcext:value-type="string">
            <text:p>Describe dominios DNS sin automatización ni controles de errore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gestión de DNS con procedimientos operativos de alcance medio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5</text:p>
          </table:table-cell>
          <table:table-cell office:value-type="string" calcext:value-type="string">
            <text:p>Análisis y corrección de vulnerabilidades</text:p>
          </table:table-cell>
          <table:table-cell office:value-type="string" calcext:value-type="string">
            <text:p>Menciona vulnerabilidades sin herramientas metodología ni clasificación de riesg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uye análisis de vulnerabilidades y priorización de correccione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6</text:p>
          </table:table-cell>
          <table:table-cell office:value-type="string" calcext:value-type="string">
            <text:p>Gestión, mantenimiento y ajuste de la herramienta para la detección de intrusiones, monitorización de la integridad, análisis de logs y respuesta ante incidentes.</text:p>
          </table:table-cell>
          <table:table-cell office:value-type="string" calcext:value-type="string">
            <text:p>Revisa logs sin SIEM correlación de eventos ni respuesta automatizad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detección y análisis de logs pero sin arquitectura SIEM detallada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7</text:p>
          </table:table-cell>
          <table:table-cell office:value-type="string" calcext:value-type="string">
            <text:p>Realización de auditorías internas de aplicaciones</text:p>
          </table:table-cell>
          <table:table-cell office:value-type="string" calcext:value-type="string">
            <text:p>Menciona auditorías sin metodología estándares ni herramientas concreta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empla auditorías de aplicaciones con una metodología parcialmente definida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8</text:p>
          </table:table-cell>
          <table:table-cell office:value-type="string" calcext:value-type="string">
            <text:p>Realización de auditorías internas continuas de los sistemas</text:p>
          </table:table-cell>
          <table:table-cell office:value-type="string" calcext:value-type="string">
            <text:p>Describe revisiones periódicas sin monitorización continua ni métrica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auditoría continua de sistemas con concreción operativa limitada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9</text:p>
          </table:table-cell>
          <table:table-cell office:value-type="string" calcext:value-type="string">
            <text:p>Mantenimiento y uso de logs centralizados</text:p>
          </table:table-cell>
          <table:table-cell office:value-type="string" calcext:value-type="string">
            <text:p>Menciona recopilación de logs sin arquitectura ni correlación de event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centralización y explotación de logs con una arquitectura más definid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10</text:p>
          </table:table-cell>
          <table:table-cell office:value-type="string" calcext:value-type="string">
            <text:p>Implementación y mantenimiento de claves RSA unificadas</text:p>
          </table:table-cell>
          <table:table-cell office:value-type="string" calcext:value-type="string">
            <text:p>Menciona gestión de claves sin procedimientos ni protección de ciclo de vid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bertura parcial de claves RSA sin rotación ni gestión centralizada definida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(SEG)</text:p>
          </table:table-cell>
          <table:table-cell office:value-type="string" calcext:value-type="string">
            <text:p>SEG11</text:p>
          </table:table-cell>
          <table:table-cell office:value-type="string" calcext:value-type="string">
            <text:p>Asistencia y soporte presencial en los diferentes eventos de Ciberseguridad de EducaMadrid</text:p>
          </table:table-cell>
          <table:table-cell office:value-type="string" calcext:value-type="string">
            <text:p>Describe asistencia general sin tareas ni procedimientos de soporte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soporte genérico en eventos sin planes de actuación ni roles específicos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tomatización y contenedores (CON)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Mantenimiento y mejora del sistema de gestión de contenedores</text:p>
          </table:table-cell>
          <table:table-cell office:value-type="string" calcext:value-type="string">
            <text:p>Menciona scripts y actualizaciones sin tecnologías ni orquestación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luye Docker y CI/CD pero no define orquestación ni gestión de clusters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tomatización y contenedores (CON)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Mantenimiento y mejora de los scripts y sistemas de automatización de tareas</text:p>
          </table:table-cell>
          <table:table-cell office:value-type="string" calcext:value-type="string">
            <text:p>Menciona automatización sin herramientas arquitectura ni control de ejecución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one Ansible y CI/CD para reducir intervención manual y mejorar trazabilidad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tomatización y contenedores (CON)</text:p>
          </table:table-cell>
          <table:table-cell office:value-type="string" calcext:value-type="string">
            <text:p>CON3</text:p>
          </table:table-cell>
          <table:table-cell office:value-type="string" calcext:value-type="string">
            <text:p>Mantenimiento y mejora del sistema auxiliar de automatización</text:p>
          </table:table-cell>
          <table:table-cell office:value-type="string" calcext:value-type="string">
            <text:p>Describe mantenimiento genérico sin componentes ni integración técnic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uciona CON3 mediante APIs REST versionadas, supervisión, reintentos, logs, Ansible, GitLab CI/CD, preproducción y seguridad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stión de la migración de servidores entre CPDs (MIG)</text:p>
          </table:table-cell>
          <table:table-cell office:value-type="string" calcext:value-type="string">
            <text:p>MIG1</text:p>
          </table:table-cell>
          <table:table-cell office:value-type="string" calcext:value-type="string">
            <text:p>Coordinación y planificación de la revisión de los entornos migrados</text:p>
          </table:table-cell>
          <table:table-cell office:value-type="string" calcext:value-type="string">
            <text:p>Menciona coordinación y revisión sin metodología criterios ni herramientas de validación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monitorización y gobierno pero sin plan estructurado de revisión postmigración.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stión de la migración de servidores entre CPDs (MIG)</text:p>
          </table:table-cell>
          <table:table-cell office:value-type="string" calcext:value-type="string">
            <text:p>MIG2</text:p>
          </table:table-cell>
          <table:table-cell office:value-type="string" calcext:value-type="string">
            <text:p>Fases preparatorias y planificación técnica de la migración</text:p>
          </table:table-cell>
          <table:table-cell office:value-type="string" calcext:value-type="string">
            <text:p>Menciona planificación sin fases cronograma ni análisis de dependencia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uye riesgos y contingencias pero no fases ni dependencias detallada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stión de la migración de servidores entre CPDs (MIG)</text:p>
          </table:table-cell>
          <table:table-cell office:value-type="string" calcext:value-type="string">
            <text:p>MIG3</text:p>
          </table:table-cell>
          <table:table-cell office:value-type="string" calcext:value-type="string">
            <text:p>Preparación de servidores y documentación de sistemas</text:p>
          </table:table-cell>
          <table:table-cell office:value-type="string" calcext:value-type="string">
            <text:p>Describe preparación y documentación sin plantillas ni automatización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cumenta recursos, servicios y dependencias por servidor y define procedimientos, checklists y recopilación automatizad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stión de la migración de servidores entre CPDs (MIG)</text:p>
          </table:table-cell>
          <table:table-cell office:value-type="string" calcext:value-type="string">
            <text:p>MIG4</text:p>
          </table:table-cell>
          <table:table-cell office:value-type="string" calcext:value-type="string">
            <text:p>verificación de la migración</text:p>
          </table:table-cell>
          <table:table-cell office:value-type="string" calcext:value-type="string">
            <text:p>Menciona comprobación posterior sin criterios de integridad ni validación objetiv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a mediante scripts el estado pre y post migración, supervisa servicios, registra incidencias y valida integridad por capa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stión de la migración de servidores entre CPDs (MIG)</text:p>
          </table:table-cell>
          <table:table-cell office:value-type="string" calcext:value-type="string">
            <text:p>MIG5</text:p>
          </table:table-cell>
          <table:table-cell office:value-type="string" calcext:value-type="string">
            <text:p>Mantenimiento y soporte tras la migración</text:p>
          </table:table-cell>
          <table:table-cell office:value-type="string" calcext:value-type="string">
            <text:p>Describe soporte posterior sin estabilización monitorización ni métricas específica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 soporte 24/7 y monitorización pero sin plan específico postmigración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eligencia Artificial (IA)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EVALUAR el rendimiento de los modelos seleccionados</text:p>
          </table:table-cell>
          <table:table-cell office:value-type="string" calcext:value-type="string">
            <text:p>No aporta contenido técnico evaluable específico para el bloque I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alúa precisión errores y sesgos pero sin métricas ni umbrales formalizado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eligencia Artificial (IA)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Ingeniería de Prompts adaptados para cada servicio</text:p>
          </table:table-cell>
          <table:table-cell office:value-type="string" calcext:value-type="string">
            <text:p>No aporta contenido técnico evaluable específico para el bloque I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one gobierno de prompts con versionado y trazabilidad pero sin herramienta específica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eligencia Artificial (IA)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esteo de los guardarraíles para el entorno educativo</text:p>
          </table:table-cell>
          <table:table-cell office:value-type="string" calcext:value-type="string">
            <text:p>No aporta contenido técnico evaluable específico para el bloque I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luye controles y auditoría de IA sin guardarraíles ni pruebas concreta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eligencia Artificial (IA)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Evaluar Posibilidades de Integración en Distintos Aplicativos</text:p>
          </table:table-cell>
          <table:table-cell office:value-type="string" calcext:value-type="string">
            <text:p>No aporta contenido técnico evaluable específico para el bloque I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one casos de uso de IA sin evaluación estructurada ni arquitectura de integración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eligencia Artificial (IA)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Evaluación de Capacidades de Respuesta y Límites por Usuario</text:p>
          </table:table-cell>
          <table:table-cell office:value-type="string" calcext:value-type="string">
            <text:p>No aporta contenido técnico evaluable específico para el bloque I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mpla consumo y límites de uso sin políticas ni mecanismos concretos.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 table:number-rows-repeated="104848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areas_anexo_ii_sistemas.A1:tareas_anexo_ii_sistemas.XF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13T21:27:19.140895708</dc:date>
    <meta:editing-duration>PT1M26S</meta:editing-duration>
    <meta:editing-cycles>1</meta:editing-cycles>
    <meta:document-statistic meta:table-count="1" meta:cell-count="630" meta:object-count="0"/>
    <meta:generator>LibreOffice/26.2.4.2$Linux_X86_64 LibreOffice_project/3346a99e6b841765b75a9b29714a5b95c6761ce3</meta:generator>
  </office:meta>
</office:document-meta>
</file>