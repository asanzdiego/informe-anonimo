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3.764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17.36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15.86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3d3d3"/>
      <style:text-properties fo:font-weight="bold" style:font-weight-asian="bold" style:font-weight-complex="bold"/>
    </style:style>
    <style:style style:name="ce2" style:family="table-cell" style:parent-style-name="Default"/>
  </office:automatic-styles>
  <office:body>
    <office:spreadsheet>
      <table:calculation-settings table:automatic-find-labels="false" table:use-regular-expressions="false" table:use-wildcards="true" table:null-year="1950"/>
      <table:table table:name="tareas_anexo_ii_exterior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number-columns-repeated="16376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PROYECTO (GRUPO)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BRE DEL SUBPROYECTO</text:p>
          </table:table-cell>
          <table:table-cell table:style-name="ce1" office:value-type="string" calcext:value-type="string">
            <text:p>desc_empresa_n</text:p>
          </table:table-cell>
          <table:table-cell table:style-name="ce1" office:value-type="string" calcext:value-type="string">
            <text:p>val_empresa_n</text:p>
          </table:table-cell>
          <table:table-cell table:style-name="ce1" office:value-type="string" calcext:value-type="string">
            <text:p>desc_empresa_s</text:p>
          </table:table-cell>
          <table:table-cell table:style-name="ce1" office:value-type="string" calcext:value-type="string">
            <text:p>val_empresa_s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yectos Web Liferay (ELIF)</text:p>
          </table:table-cell>
          <table:table-cell office:value-type="string" calcext:value-type="string">
            <text:p>ELIF1</text:p>
          </table:table-cell>
          <table:table-cell office:value-type="string" calcext:value-type="string">
            <text:p>Adaptaciones de las páginas web Liferay</text:p>
          </table:table-cell>
          <table:table-cell office:value-type="string" calcext:value-type="string">
            <text:p>Cubre Liferay y propone virtual hosts y despliegues controlados pero sin suficiente detalle técnico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one reutilizar componentes y reforzar la mantenibilidad de las adaptaciones Liferay.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yectos Web Liferay (ELIF)</text:p>
          </table:table-cell>
          <table:table-cell office:value-type="string" calcext:value-type="string">
            <text:p>ELIF2</text:p>
          </table:table-cell>
          <table:table-cell office:value-type="string" calcext:value-type="string">
            <text:p>Barra de herramientas y pie de EducaMadrid</text:p>
          </table:table-cell>
          <table:table-cell office:value-type="string" calcext:value-type="string">
            <text:p>Aborda la barra y el pie común con un design system reutilizable pero con desarrollo limitado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nciona la evolución de la barra y el pie corporativos sin desarrollo técnico suficiente.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yectos Web Liferay (ELIF)</text:p>
          </table:table-cell>
          <table:table-cell office:value-type="string" calcext:value-type="string">
            <text:p>ELIF3</text:p>
          </table:table-cell>
          <table:table-cell office:value-type="string" calcext:value-type="string">
            <text:p>Mejoras de presentación</text:p>
          </table:table-cell>
          <table:table-cell office:value-type="string" calcext:value-type="string">
            <text:p>Plantea una arquitectura frontend desacoplada pero deja limitada la concreción de la implantación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scribe mejoras de presentación con una cobertura funcional y técnica suficiente.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yectos Web Liferay (ELIF)</text:p>
          </table:table-cell>
          <table:table-cell office:value-type="string" calcext:value-type="string">
            <text:p>ELIF4</text:p>
          </table:table-cell>
          <table:table-cell office:value-type="string" calcext:value-type="string">
            <text:p>Mejoras de usabilidad y accesibilidad</text:p>
          </table:table-cell>
          <table:table-cell office:value-type="string" calcext:value-type="string">
            <text:p>Propone mejora continua de accesibilidad pero sin procedimientos verificables ni métrica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luye auditorías de accesibilidad y automatización de releases con detalle aún incompleto.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joras y mantenimiento de la web de Innovación y Formación del Profesorado (IFP)</text:p>
          </table:table-cell>
          <table:table-cell office:value-type="string" calcext:value-type="string">
            <text:p>IFP1</text:p>
          </table:table-cell>
          <table:table-cell office:value-type="string" calcext:value-type="string">
            <text:p>Mejoras y mantenimiento de la web de Innovación y Formación del Profesorado (IFP)</text:p>
          </table:table-cell>
          <table:table-cell office:value-type="string" calcext:value-type="string">
            <text:p>Cubre la evolución de la web IFP con desarrollo suficiente pero sin concreción técnica completa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ine migración a Drupal 11 e integración progresiva con carencias de métricas y herramientas.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yectos Moodle Misc (EMOM)</text:p>
          </table:table-cell>
          <table:table-cell office:value-type="string" calcext:value-type="string">
            <text:p>EMOM1</text:p>
          </table:table-cell>
          <table:table-cell office:value-type="string" calcext:value-type="string">
            <text:p>Actualización de la plataforma MoodleMisc</text:p>
          </table:table-cell>
          <table:table-cell office:value-type="string" calcext:value-type="string">
            <text:p>Propone actualización con CI/CD y auditoría automatizada pero sin suficiente detalle de validación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antea inventario y actualización escalonada con validaciones funcionales sin métricas objetivas.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yectos Moodle Misc (EMOM)</text:p>
          </table:table-cell>
          <table:table-cell office:value-type="string" calcext:value-type="string">
            <text:p>EMOM2</text:p>
          </table:table-cell>
          <table:table-cell office:value-type="string" calcext:value-type="string">
            <text:p>Adaptación de la plataforma MoodleMisc</text:p>
          </table:table-cell>
          <table:table-cell office:value-type="string" calcext:value-type="string">
            <text:p>Menciona las adaptaciones requeridas de MoodleMisc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bre integraciones y escalado de MoodleMisc aunque sin mecanismos técnicos detallados.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yectos Moodle Misc (EMOM)</text:p>
          </table:table-cell>
          <table:table-cell office:value-type="string" calcext:value-type="string">
            <text:p>EMOM3</text:p>
          </table:table-cell>
          <table:table-cell office:value-type="string" calcext:value-type="string">
            <text:p>Mantenimiento de la plataforma MoodleMisc</text:p>
          </table:table-cell>
          <table:table-cell office:value-type="string" calcext:value-type="string">
            <text:p>Aborda el mantenimiento evolutivo y correctivo de forma general y poco individualizad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luye mantenimiento integral y Redis clusterizado como mejora de rendimiento.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yectos Moodle Misc (EMOM)</text:p>
          </table:table-cell>
          <table:table-cell office:value-type="string" calcext:value-type="string">
            <text:p>EMOM4</text:p>
          </table:table-cell>
          <table:table-cell office:value-type="string" calcext:value-type="string">
            <text:p>Mejora de la Ciberseguridad en Moodle Misc</text:p>
          </table:table-cell>
          <table:table-cell office:value-type="string" calcext:value-type="string">
            <text:p>Propone endurecimiento y seguridad de MoodleMisc sin configuraciones ni controles concreto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bre medidas de seguridad y cabeceras pero sin indicadores ni configuración avanzada.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oyectos Moodle Misc (EMOM)</text:p>
          </table:table-cell>
          <table:table-cell office:value-type="string" calcext:value-type="string">
            <text:p>EMOM5</text:p>
          </table:table-cell>
          <table:table-cell office:value-type="string" calcext:value-type="string">
            <text:p>Solución de problemas conocidos en Moodle Misc</text:p>
          </table:table-cell>
          <table:table-cell office:value-type="string" calcext:value-type="string">
            <text:p>Identifica los problemas conocidos y plantea su resolución con desarrollo suficiente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pone reproducción análisis corrección y validación pero sin casos ni métricas específicas.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oyectos Moodle Misc (EMOM)</text:p>
          </table:table-cell>
          <table:table-cell office:value-type="string" calcext:value-type="string">
            <text:p>EMOM6</text:p>
          </table:table-cell>
          <table:table-cell office:value-type="string" calcext:value-type="string">
            <text:p>Tareas sobre las configuraciones para las conexiones externas</text:p>
          </table:table-cell>
          <table:table-cell office:value-type="string" calcext:value-type="string">
            <text:p>Reconoce las conexiones externas pero no concreta escenarios ni arquitecturas de integración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luye Marsupial LTI y editoriales de forma genérica y sin procedimientos detallados.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oyectos Moodle Misc (EMOM)</text:p>
          </table:table-cell>
          <table:table-cell office:value-type="string" calcext:value-type="string">
            <text:p>EMOM7</text:p>
          </table:table-cell>
          <table:table-cell office:value-type="string" calcext:value-type="string">
            <text:p>Otras tareas específicas para la actualización y procedimiento en Moodle Misc</text:p>
          </table:table-cell>
          <table:table-cell office:value-type="string" calcext:value-type="string">
            <text:p>Menciona automatización y operación de MoodleMisc con desarrollo técnico de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luye automatización y una integración selectiva con SSO como valor añadido.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royectos de Dinámicas (EDIN)</text:p>
          </table:table-cell>
          <table:table-cell office:value-type="string" calcext:value-type="string">
            <text:p>EDIN1</text:p>
          </table:table-cell>
          <table:table-cell office:value-type="string" calcext:value-type="string">
            <text:p>Mantenimiento, actualización y adecuación ENS del entorno Dinámicas</text:p>
          </table:table-cell>
          <table:table-cell office:value-type="string" calcext:value-type="string">
            <text:p>Cubre mantenimiento y ENS del entorno Dinámicas de forma general sin mecanismos concreto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luye inventario y matriz de riesgos para mantenimiento y adecuación ENS.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royectos de Dinámicas (EDIN)</text:p>
          </table:table-cell>
          <table:table-cell office:value-type="string" calcext:value-type="string">
            <text:p>EDIN2</text:p>
          </table:table-cell>
          <table:table-cell office:value-type="string" calcext:value-type="string">
            <text:p>Mantenimiento, actualización y mejora del espacio FTP</text:p>
          </table:table-cell>
          <table:table-cell office:value-type="string" calcext:value-type="string">
            <text:p>Menciona actualización y seguridad del FTP sin procedimientos técnicos verificable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orda mantenimiento y mejora del FTP con desarrollo metodológico limitado.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royectos de Integración con la Plataforma de EducaMadrid (EIPE)</text:p>
          </table:table-cell>
          <table:table-cell office:value-type="string" calcext:value-type="string">
            <text:p>EIPE1</text:p>
          </table:table-cell>
          <table:table-cell office:value-type="string" calcext:value-type="string">
            <text:p>Modificación de aplicaciones, plugins y scripts de integración</text:p>
          </table:table-cell>
          <table:table-cell office:value-type="string" calcext:value-type="string">
            <text:p>Propone modificaciones de integración de forma general sin detalle por tecnologí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bre aplicaciones plugins y scripts de integración con una solución suficientemente desarrollada.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oyectos de Integración con la Plataforma de EducaMadrid (EIPE)</text:p>
          </table:table-cell>
          <table:table-cell office:value-type="string" calcext:value-type="string">
            <text:p>EIPE2</text:p>
          </table:table-cell>
          <table:table-cell office:value-type="string" calcext:value-type="string">
            <text:p>Modificaciones Front-End (HTML, CSS y JavaScript)</text:p>
          </table:table-cell>
          <table:table-cell office:value-type="string" calcext:value-type="string">
            <text:p>Aborda cambios frontend para integración sin definir procedimientos de implementación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one adaptaciones HTML CSS y JavaScript con cobertura suficiente aunque no exhaustiva.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1</text:p>
          </table:table-cell>
          <table:table-cell office:value-type="string" calcext:value-type="string">
            <text:p>Servicio de actualización del software base</text:p>
          </table:table-cell>
          <table:table-cell office:value-type="string" calcext:value-type="string">
            <text:p>Define actualizaciones con validaciones previas y una cobertura técnica sólida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one automatización y gobierno del ciclo de vida del software base.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2</text:p>
          </table:table-cell>
          <table:table-cell office:value-type="string" calcext:value-type="string">
            <text:p>Servicio de actualización del bases de datos</text:p>
          </table:table-cell>
          <table:table-cell office:value-type="string" calcext:value-type="string">
            <text:p>Cubre la actualización de bases de datos y plantea optimización continua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one actualización gobernada de plataformas de datos con detalle técnico relevante.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3</text:p>
          </table:table-cell>
          <table:table-cell office:value-type="string" calcext:value-type="string">
            <text:p>Consultoría de integración</text:p>
          </table:table-cell>
          <table:table-cell office:value-type="string" calcext:value-type="string">
            <text:p>Menciona análisis y soporte de integración sin metodología ni entregables concreto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ine un modelo avanzado de gobierno e integración de servicios.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4</text:p>
          </table:table-cell>
          <table:table-cell office:value-type="string" calcext:value-type="string">
            <text:p>Consultoría de ciberseguridad</text:p>
          </table:table-cell>
          <table:table-cell office:value-type="string" calcext:value-type="string">
            <text:p>Propone asesoramiento de seguridad general sin mecanismos técnicos ni validación definido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ntea un modelo centralizado y gobernado de integración segura.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5</text:p>
          </table:table-cell>
          <table:table-cell office:value-type="string" calcext:value-type="string">
            <text:p>Actualización de la autenticación centralizada de usuarios</text:p>
          </table:table-cell>
          <table:table-cell office:value-type="string" calcext:value-type="string">
            <text:p>Aborda la evolución de autenticación de forma general sin arquitectura concret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one evolucionar la autenticación centralizada hacia una plataforma moderna.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6</text:p>
          </table:table-cell>
          <table:table-cell office:value-type="string" calcext:value-type="string">
            <text:p>Mantenimiento de la autenticación centralizada de usuarios</text:p>
          </table:table-cell>
          <table:table-cell office:value-type="string" calcext:value-type="string">
            <text:p>Menciona supervisión y mantenimiento de identidad sin procedimientos operativos detallado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rta modernización y gobierno IAM como valor añadido del mantenimiento.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7</text:p>
          </table:table-cell>
          <table:table-cell office:value-type="string" calcext:value-type="string">
            <text:p>Gestión de servicios para la sincronización de usuarios</text:p>
          </table:table-cell>
          <table:table-cell office:value-type="string" calcext:value-type="string">
            <text:p>Reconoce la sincronización de identidades pero no concreta mecanismos ni controle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one una plataforma de gobierno y observabilidad de identidades.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8</text:p>
          </table:table-cell>
          <table:table-cell office:value-type="string" calcext:value-type="string">
            <text:p>Supervisión de usuarios de aplicaciones externas</text:p>
          </table:table-cell>
          <table:table-cell office:value-type="string" calcext:value-type="string">
            <text:p>Plantea supervisión de usuarios y permisos sin detalle técnico verificabl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luye control IAM para supervisar identidades y accesos de aplicaciones externas.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9</text:p>
          </table:table-cell>
          <table:table-cell office:value-type="string" calcext:value-type="string">
            <text:p>Soporte técnico en entornos de preproducción</text:p>
          </table:table-cell>
          <table:table-cell office:value-type="string" calcext:value-type="string">
            <text:p>Menciona acompañamiento y validación de preproducción sin criterios de aceptación definido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one validación automatizada y gobernada de aplicaciones en preproducción.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10</text:p>
          </table:table-cell>
          <table:table-cell office:value-type="string" calcext:value-type="string">
            <text:p>Despliegue de aplicaciones externas en producción</text:p>
          </table:table-cell>
          <table:table-cell office:value-type="string" calcext:value-type="string">
            <text:p>Describe coordinación y validación de despliegues sin procedimiento técnico completo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ntea un modelo DevSecOps para despliegues de aplicaciones externas.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11</text:p>
          </table:table-cell>
          <table:table-cell office:value-type="string" calcext:value-type="string">
            <text:p>Integración en el Gestor de Servidores de Bases de Datos</text:p>
          </table:table-cell>
          <table:table-cell office:value-type="string" calcext:value-type="string">
            <text:p>No identifica una propuesta específica para integrar con el gestor corporativo de BBDD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one administración centralizada y automatizada de los servidores de bases de datos.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12</text:p>
          </table:table-cell>
          <table:table-cell office:value-type="string" calcext:value-type="string">
            <text:p>Estudio de los recursos solicitados</text:p>
          </table:table-cell>
          <table:table-cell office:value-type="string" calcext:value-type="string">
            <text:p>Contempla estudios de capacidad pero sin metodología de dimensionamiento concret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luye capacity planning para estudiar y dimensionar los recursos solicitados.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13</text:p>
          </table:table-cell>
          <table:table-cell office:value-type="string" calcext:value-type="string">
            <text:p>Solicitud de los recursos necesarios</text:p>
          </table:table-cell>
          <table:table-cell office:value-type="string" calcext:value-type="string">
            <text:p>Aborda la gestión de solicitudes de recursos de forma general y sin flujos definido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one aprovisionamiento automatizado y gobernado de los recursos necesarios.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14</text:p>
          </table:table-cell>
          <table:table-cell office:value-type="string" calcext:value-type="string">
            <text:p>Bastionado de los recursos solicitados</text:p>
          </table:table-cell>
          <table:table-cell office:value-type="string" calcext:value-type="string">
            <text:p>No se identifica una solución específica de bastionado de sistema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ine hardening alineado con CIS y ENS como valor añadido.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15</text:p>
          </table:table-cell>
          <table:table-cell office:value-type="string" calcext:value-type="string">
            <text:p>Instalación de la paquetería y gestión de dependencias</text:p>
          </table:table-cell>
          <table:table-cell office:value-type="string" calcext:value-type="string">
            <text:p>Menciona actualización de componentes sin control detallado de dependencia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rta automatización DevSecOps e infraestructura como código para dependencias.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16</text:p>
          </table:table-cell>
          <table:table-cell office:value-type="string" calcext:value-type="string">
            <text:p>Configuración del entorno</text:p>
          </table:table-cell>
          <table:table-cell office:value-type="string" calcext:value-type="string">
            <text:p>Incluye parametrización y soporte de configuración sin procedimientos reproducible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one automatización de configuraciones mediante IaC y auditoría automática.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17</text:p>
          </table:table-cell>
          <table:table-cell office:value-type="string" calcext:value-type="string">
            <text:p>Soporte para la integración con el LDAP de la plataforma EducaMadrid</text:p>
          </table:table-cell>
          <table:table-cell office:value-type="string" calcext:value-type="string">
            <text:p>Menciona integración con directorio sin definir flujos ni mecanismos LDAP concreto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one evolucionar LDAP hacia un modelo de Identity Governance.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18</text:p>
          </table:table-cell>
          <table:table-cell office:value-type="string" calcext:value-type="string">
            <text:p>Soporte para la integración con el sistema de correo de la plataforma EducaMadrid</text:p>
          </table:table-cell>
          <table:table-cell office:value-type="string" calcext:value-type="string">
            <text:p>Reconoce la integración de correo sin configurar protocolos ni validaciones concreta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luye integración con correo y mejoras de seguridad SPF y DKIM.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19</text:p>
          </table:table-cell>
          <table:table-cell office:value-type="string" calcext:value-type="string">
            <text:p>Soporte para la integración con distintas BBDD de la plataforma EducaMadrid</text:p>
          </table:table-cell>
          <table:table-cell office:value-type="string" calcext:value-type="string">
            <text:p>Plantea integración con repositorios de datos sin arquitectura ni mecanismos específico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one gobierno y observabilidad de datos para las integraciones de BBDD.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20</text:p>
          </table:table-cell>
          <table:table-cell office:value-type="string" calcext:value-type="string">
            <text:p>Soporte para la integración del CMDB de la plataforma EducaMadrid</text:p>
          </table:table-cell>
          <table:table-cell office:value-type="string" calcext:value-type="string">
            <text:p>Menciona trazabilidad y activos sin integración concreta con el CMDB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rta gestión avanzada del CMDB para la integración y trazabilidad de activos.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21</text:p>
          </table:table-cell>
          <table:table-cell office:value-type="string" calcext:value-type="string">
            <text:p>Documentación del proyecto externo</text:p>
          </table:table-cell>
          <table:table-cell office:value-type="string" calcext:value-type="string">
            <text:p>Cubre gestión documental y transferencia de conocimiento sin entregables ni control detallado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ntea gobierno del conocimiento para la documentación de proyectos externos.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22</text:p>
          </table:table-cell>
          <table:table-cell office:value-type="string" calcext:value-type="string">
            <text:p>Gestión del riesgo del proyecto externo</text:p>
          </table:table-cell>
          <table:table-cell office:value-type="string" calcext:value-type="string">
            <text:p>Desarrolla gestión de riesgos e incorpora metodología MAGERIT con limitaciones de concreción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cluye metodología MAGERIT para identificar tratar y seguir los riesgos.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23</text:p>
          </table:table-cell>
          <table:table-cell office:value-type="string" calcext:value-type="string">
            <text:p>Implementación de sistemas de Backups y procedimiento de Disaster Recovery</text:p>
          </table:table-cell>
          <table:table-cell office:value-type="string" calcext:value-type="string">
            <text:p>Describe copias y recuperación ante desastres de forma razonable pero sin métricas de validación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pone repositorios WORM y replicación entre CPDs para respaldo y recuperación.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24</text:p>
          </table:table-cell>
          <table:table-cell office:value-type="string" calcext:value-type="string">
            <text:p>Implementación de monitorización básica</text:p>
          </table:table-cell>
          <table:table-cell office:value-type="string" calcext:value-type="string">
            <text:p>Menciona monitorización de infraestructuras y servicios sin definir herramientas ni indicadore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bre monitorización básica pero sin propuesta de mejora ni suficiente desarrollo técnico.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25</text:p>
          </table:table-cell>
          <table:table-cell office:value-type="string" calcext:value-type="string">
            <text:p>Implementación de monitorización avanzada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Aporta inteligencia operacional e integración con SOC para monitorización avanzada.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26</text:p>
          </table:table-cell>
          <table:table-cell office:value-type="string" calcext:value-type="string">
            <text:p>Implementación de servicios de ciberseguridad básico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ropone MFA unificado hardening STIC y reporting ENS como valor añadido.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27</text:p>
          </table:table-cell>
          <table:table-cell office:value-type="string" calcext:value-type="string">
            <text:p>Implementación de servicios de ciberseguridad avanzado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ropone defensa activa continua y observabilidad inteligente de la seguridad.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28</text:p>
          </table:table-cell>
          <table:table-cell office:value-type="string" calcext:value-type="string">
            <text:p>Actualización de los sistemas operativos</text:p>
          </table:table-cell>
          <table:table-cell office:value-type="string" calcext:value-type="string">
            <text:p>Aborda actualizaciones de sistemas operativos pero sin planificación y métricas suficientemente concreta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ine gestión proactiva del ciclo de vida tecnológico de los sistemas operativos.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29</text:p>
          </table:table-cell>
          <table:table-cell office:value-type="string" calcext:value-type="string">
            <text:p>Gestión y seguimiento del proyecto</text:p>
          </table:table-cell>
          <table:table-cell office:value-type="string" calcext:value-type="string">
            <text:p>Propone gobernanza y seguimiento con cobertura adecuada pero limitada en indicadores verificable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orta un modelo integral de gobierno técnico y seguimiento del proyecto.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30</text:p>
          </table:table-cell>
          <table:table-cell office:value-type="string" calcext:value-type="string">
            <text:p>Segmentación de la actual red de servidore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Menciona microsegmentación y seguridad adaptativa sin desarrollo suficientemente concreto.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31</text:p>
          </table:table-cell>
          <table:table-cell office:value-type="string" calcext:value-type="string">
            <text:p>Optimización de la infraestructura de virtualización del entorno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ropone evolucionar la virtualización para escenarios preparados para IA.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eguridad de Aplicaciones Web (ESEG)</text:p>
          </table:table-cell>
          <table:table-cell office:value-type="string" calcext:value-type="string">
            <text:p>ESEG1</text:p>
          </table:table-cell>
          <table:table-cell office:value-type="string" calcext:value-type="string">
            <text:p>Realización de Auditorías/Pentesting Web</text:p>
          </table:table-cell>
          <table:table-cell office:value-type="string" calcext:value-type="string">
            <text:p>Incluye pentesting y seguimiento de vulnerabilidades con limitaciones de detalle metodológico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pone validación ofensiva continua para auditorías y pentesting web.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eguridad de Aplicaciones Web (ESEG)</text:p>
          </table:table-cell>
          <table:table-cell office:value-type="string" calcext:value-type="string">
            <text:p>ESEG2</text:p>
          </table:table-cell>
          <table:table-cell office:value-type="string" calcext:value-type="string">
            <text:p>Gestión de logs de las aplicaciones Web</text:p>
          </table:table-cell>
          <table:table-cell office:value-type="string" calcext:value-type="string">
            <text:p>Aborda la gestión de logs sin concretar arquitectura de correlación ni indicadore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nciona gestión de logs y evolución hacia SIEM sin suficiente desarrollo técnico.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eguridad de Aplicaciones Web (ESEG)</text:p>
          </table:table-cell>
          <table:table-cell office:value-type="string" calcext:value-type="string">
            <text:p>ESEG3</text:p>
          </table:table-cell>
          <table:table-cell office:value-type="string" calcext:value-type="string">
            <text:p>Análisis y protección de la superficie de ataque</text:p>
          </table:table-cell>
          <table:table-cell office:value-type="string" calcext:value-type="string">
            <text:p>Propone supervisión de la superficie expuesta pero sin mecanismos técnicos detallado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ntea Attack Surface Management para analizar y proteger la exposición web.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ealización de pruebas de desarrollo seguro de aplicaciones web (EDSA)</text:p>
          </table:table-cell>
          <table:table-cell office:value-type="string" calcext:value-type="string">
            <text:p>EDSA1</text:p>
          </table:table-cell>
          <table:table-cell office:value-type="string" calcext:value-type="string">
            <text:p>Análisis de Código Web</text:p>
          </table:table-cell>
          <table:table-cell office:value-type="string" calcext:value-type="string">
            <text:p>Incluye análisis automatizado de código con cobertura adecuada pero validación limitada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pone implantar DevSecOps para integrar el análisis de código seguro.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ealización de pruebas de desarrollo seguro de aplicaciones web (EDSA)</text:p>
          </table:table-cell>
          <table:table-cell office:value-type="string" calcext:value-type="string">
            <text:p>EDSA2</text:p>
          </table:table-cell>
          <table:table-cell office:value-type="string" calcext:value-type="string">
            <text:p>Ayuda al Desarrollo Seguro de Código Web</text:p>
          </table:table-cell>
          <table:table-cell office:value-type="string" calcext:value-type="string">
            <text:p>Menciona asesoramiento y revisión de desarrollo seguro sin procedimientos de acompañamiento concreto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luye seguridad integrada en el ciclo de desarrollo como valor añadido.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estión del programa de Bug Bounty (EBBO)</text:p>
          </table:table-cell>
          <table:table-cell office:value-type="string" calcext:value-type="string">
            <text:p>EBBO1</text:p>
          </table:table-cell>
          <table:table-cell office:value-type="string" calcext:value-type="string">
            <text:p>Mantenimiento y gestión del programa de Bug Bounty</text:p>
          </table:table-cell>
          <table:table-cell office:value-type="string" calcext:value-type="string">
            <text:p>Cubre la gestión del Bug Bounty con un desarrollo operativo general y poco detallado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orda el mantenimiento del Bug Bounty sin suficiente concreción técnica.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 table:number-rows-repeated="104852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tareas_anexo_ii_exteriores.A1:tareas_anexo_ii_exteriores.XFD1048576">
            <calcext:color-scale>
              <calcext:color-scale-entry calcext:value="1" calcext:type="number" calcext:color="#ff3838"/>
              <calcext:color-scale-entry calcext:value="50" calcext:type="percentile" calcext:color="#ffff38"/>
              <calcext:color-scale-entry calcext:value="10" calcext:type="number" calcext:color="#3faf46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7-11T18:31:41.455467975</dc:date>
    <meta:editing-duration>PT2M10S</meta:editing-duration>
    <meta:editing-cycles>1</meta:editing-cycles>
    <meta:document-statistic meta:table-count="1" meta:cell-count="427" meta:object-count="0"/>
    <meta:generator>LibreOffice/26.2.4.2$Linux_X86_64 LibreOffice_project/3346a99e6b841765b75a9b29714a5b95c6761ce3</meta:generator>
  </office:meta>
</office:document-meta>
</file>