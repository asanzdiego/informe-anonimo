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13.76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8.06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5.8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_ii_exterior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7" table:default-cell-style-name="ce1"/>
        <table:table-row table:style-name="ro1">
          <table:table-cell office:value-type="string" calcext:value-type="string">
            <text:p>PROYECTO (GRUPO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 DEL SUBPROYECTO</text:p>
          </table:table-cell>
          <table:table-cell office:value-type="string" calcext:value-type="string">
            <text:p>desc_empresa_n</text:p>
          </table:table-cell>
          <table:table-cell office:value-type="string" calcext:value-type="string">
            <text:p>val_empresa_n</text:p>
          </table:table-cell>
          <table:table-cell office:value-type="string" calcext:value-type="string">
            <text:p>desc_empresa_s</text:p>
          </table:table-cell>
          <table:table-cell office:value-type="string" calcext:value-type="string">
            <text:p>val_empresa_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evolutivo y adaptativo de Proyectos web Liferay (ELIF)</text:p>
          </table:table-cell>
          <table:table-cell office:value-type="string" calcext:value-type="string">
            <text:p>ELIF1</text:p>
          </table:table-cell>
          <table:table-cell office:value-type="string" calcext:value-type="string">
            <text:p>Adaptaciones de las páginas web Liferay</text:p>
          </table:table-cell>
          <table:table-cell office:value-type="string" calcext:value-type="string">
            <text:p>Cubre Liferay y propone virtual hosts y despliegues controlados pero sin suficiente detalle técnic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reutilizar componentes y reforzar la mantenibilidad de las adaptaciones Liferay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evolutivo y adaptativo de Proyectos web Liferay (ELIF)</text:p>
          </table:table-cell>
          <table:table-cell office:value-type="string" calcext:value-type="string">
            <text:p>ELIF2</text:p>
          </table:table-cell>
          <table:table-cell office:value-type="string" calcext:value-type="string">
            <text:p>Barra de herramientas y pie de EducaMadrid</text:p>
          </table:table-cell>
          <table:table-cell office:value-type="string" calcext:value-type="string">
            <text:p>Aborda la barra y el pie común con un design system reutilizable pero con desarrollo limit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ciona la evolución de la barra y el pie corporativos sin desarrollo técnico suficiente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evolutivo y adaptativo de Proyectos web Liferay (ELIF)</text:p>
          </table:table-cell>
          <table:table-cell office:value-type="string" calcext:value-type="string">
            <text:p>ELIF3</text:p>
          </table:table-cell>
          <table:table-cell office:value-type="string" calcext:value-type="string">
            <text:p>Mejoras de presentación</text:p>
          </table:table-cell>
          <table:table-cell office:value-type="string" calcext:value-type="string">
            <text:p>Plantea una arquitectura frontend desacoplada pero deja limitada la concreción de la implant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cribe mejoras de presentación con una cobertura funcional y técnica suficient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evolutivo y adaptativo de Proyectos web Liferay (ELIF)</text:p>
          </table:table-cell>
          <table:table-cell office:value-type="string" calcext:value-type="string">
            <text:p>ELIF4</text:p>
          </table:table-cell>
          <table:table-cell office:value-type="string" calcext:value-type="string">
            <text:p>Mejoras de usabilidad y accesibilidad</text:p>
          </table:table-cell>
          <table:table-cell office:value-type="string" calcext:value-type="string">
            <text:p>Propone mejora continua de accesibilidad pero sin procedimientos verificables ni métr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auditorías de accesibilidad y automatización de releases con detalle aún incomple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joras y mantenimiento de la web de Innovación y Formación del Profesorado (IFP)</text:p>
          </table:table-cell>
          <table:table-cell office:value-type="string" calcext:value-type="string">
            <text:p>IFP1</text:p>
          </table:table-cell>
          <table:table-cell office:value-type="string" calcext:value-type="string">
            <text:p>Mejoras y mantenimiento de la web de Innovación y Formación del Profesorado (IFP)</text:p>
          </table:table-cell>
          <table:table-cell office:value-type="string" calcext:value-type="string">
            <text:p>Cubre la evolución de la web IFP con desarrollo suficiente pero sin concreción técnica complet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ine migración a Drupal 11 e integración progresiva con carencias de métricas y herramient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1</text:p>
          </table:table-cell>
          <table:table-cell office:value-type="string" calcext:value-type="string">
            <text:p>Actualización de la plataforma MoodleMisc</text:p>
          </table:table-cell>
          <table:table-cell office:value-type="string" calcext:value-type="string">
            <text:p>Propone actualización con CI/CD y auditoría automatizada pero sin suficiente detalle de valid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ntea inventario y actualización escalonada con validaciones funcionales sin métricas objetiv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2</text:p>
          </table:table-cell>
          <table:table-cell office:value-type="string" calcext:value-type="string">
            <text:p>Adaptación de la plataforma MoodleMisc</text:p>
          </table:table-cell>
          <table:table-cell office:value-type="string" calcext:value-type="string">
            <text:p>Menciona las adaptaciones requeridas de MoodleMisc con desarrollo técnico insuficient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re integraciones y escalado de MoodleMisc aunque sin mecanismos técnicos detallad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3</text:p>
          </table:table-cell>
          <table:table-cell office:value-type="string" calcext:value-type="string">
            <text:p>Mantenimiento de la plataforma MoodleMisc</text:p>
          </table:table-cell>
          <table:table-cell office:value-type="string" calcext:value-type="string">
            <text:p>Aborda el mantenimiento evolutivo y correctivo de forma general y poco individualizad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mantenimiento integral y Redis clusterizado como mejora de rend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4</text:p>
          </table:table-cell>
          <table:table-cell office:value-type="string" calcext:value-type="string">
            <text:p>Mejora de la Ciberseguridad en Moodle Misc</text:p>
          </table:table-cell>
          <table:table-cell office:value-type="string" calcext:value-type="string">
            <text:p>Propone endurecimiento y seguridad de MoodleMisc sin configuraciones ni controles concre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re medidas de seguridad y cabeceras pero sin indicadores ni configuración avanz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5</text:p>
          </table:table-cell>
          <table:table-cell office:value-type="string" calcext:value-type="string">
            <text:p>Solución de problemas conocidos en Moodle Misc</text:p>
          </table:table-cell>
          <table:table-cell office:value-type="string" calcext:value-type="string">
            <text:p>Identifica los problemas conocidos y plantea su resolución con desarrollo suficient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reproducción análisis corrección y validación pero sin casos ni métricas específica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6</text:p>
          </table:table-cell>
          <table:table-cell office:value-type="string" calcext:value-type="string">
            <text:p>Tareas sobre las configuraciones para las conexiones externas</text:p>
          </table:table-cell>
          <table:table-cell office:value-type="string" calcext:value-type="string">
            <text:p>Reconoce las conexiones externas pero no concreta escenarios ni arquitecturas de integr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Marsupial LTI y editoriales de forma genérica y sin procedimientos detalla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Moodle Misc (EMOM)</text:p>
          </table:table-cell>
          <table:table-cell office:value-type="string" calcext:value-type="string">
            <text:p>EMOM7</text:p>
          </table:table-cell>
          <table:table-cell office:value-type="string" calcext:value-type="string">
            <text:p>Otras tareas específicas para la actualización y procedimiento en Moodle Misc</text:p>
          </table:table-cell>
          <table:table-cell office:value-type="string" calcext:value-type="string">
            <text:p>Menciona automatización y operación de MoodleMisc con desarrollo técnico deficient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automatización y una integración selectiva con SSO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Dinámicas (EDIN)</text:p>
          </table:table-cell>
          <table:table-cell office:value-type="string" calcext:value-type="string">
            <text:p>EDIN1</text:p>
          </table:table-cell>
          <table:table-cell office:value-type="string" calcext:value-type="string">
            <text:p>Mantenimiento, actualización y adecuación ENS del entorno Dinámicas</text:p>
          </table:table-cell>
          <table:table-cell office:value-type="string" calcext:value-type="string">
            <text:p>Cubre mantenimiento y ENS del entorno Dinámicas de forma general sin mecanismos concre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inventario y matriz de riesgos para mantenimiento y adecuación EN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Dinámicas (EDIN)</text:p>
          </table:table-cell>
          <table:table-cell office:value-type="string" calcext:value-type="string">
            <text:p>EDIN2</text:p>
          </table:table-cell>
          <table:table-cell office:value-type="string" calcext:value-type="string">
            <text:p>Mantenimiento, actualización y mejora del espacio FTP</text:p>
          </table:table-cell>
          <table:table-cell office:value-type="string" calcext:value-type="string">
            <text:p>Menciona actualización y seguridad del FTP sin procedimientos técnicos verificab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rda mantenimiento y mejora del FTP con desarrollo metodológico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Integración con la Plataforma de EducaMadrid (EIPE)</text:p>
          </table:table-cell>
          <table:table-cell office:value-type="string" calcext:value-type="string">
            <text:p>EIPE1</text:p>
          </table:table-cell>
          <table:table-cell office:value-type="string" calcext:value-type="string">
            <text:p>Modificación de aplicaciones, plugins y scripts de integración</text:p>
          </table:table-cell>
          <table:table-cell office:value-type="string" calcext:value-type="string">
            <text:p>Propone modificaciones de integración de forma general sin detalle por tecnologí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re aplicaciones plugins y scripts de integración con una solución suficientemente desarroll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Integración con la Plataforma de EducaMadrid (EIPE)</text:p>
          </table:table-cell>
          <table:table-cell office:value-type="string" calcext:value-type="string">
            <text:p>EIPE2</text:p>
          </table:table-cell>
          <table:table-cell office:value-type="string" calcext:value-type="string">
            <text:p>Modificaciones Front-End (HTML, CSS y JavaScript)</text:p>
          </table:table-cell>
          <table:table-cell office:value-type="string" calcext:value-type="string">
            <text:p>Aborda cambios frontend para integración sin definir procedimientos de implement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daptaciones HTML CSS y JavaScript con cobertura suficiente aunque no exhaustiv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</text:p>
          </table:table-cell>
          <table:table-cell office:value-type="string" calcext:value-type="string">
            <text:p>Servicio de actualización del software base</text:p>
          </table:table-cell>
          <table:table-cell office:value-type="string" calcext:value-type="string">
            <text:p>Define actualizaciones con validaciones previas y una cobertura técnica sóli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ne automatización y gobierno del ciclo de vida del software bas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</text:p>
          </table:table-cell>
          <table:table-cell office:value-type="string" calcext:value-type="string">
            <text:p>Servicio de actualización del bases de datos</text:p>
          </table:table-cell>
          <table:table-cell office:value-type="string" calcext:value-type="string">
            <text:p>Cubre la actualización de bases de datos y plantea optimización continu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ne actualización gobernada de plataformas de datos con detalle técnico relevant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</text:p>
          </table:table-cell>
          <table:table-cell office:value-type="string" calcext:value-type="string">
            <text:p>Consultoría de integración</text:p>
          </table:table-cell>
          <table:table-cell office:value-type="string" calcext:value-type="string">
            <text:p>Menciona análisis y soporte de integración sin metodología ni entregables concre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ine un modelo avanzado de gobierno e integración de servici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4</text:p>
          </table:table-cell>
          <table:table-cell office:value-type="string" calcext:value-type="string">
            <text:p>Consultoría de ciberseguridad</text:p>
          </table:table-cell>
          <table:table-cell office:value-type="string" calcext:value-type="string">
            <text:p>Propone asesoramiento de seguridad general sin mecanismos técnicos ni validación defini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a un modelo centralizado y gobernado de integración segur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5</text:p>
          </table:table-cell>
          <table:table-cell office:value-type="string" calcext:value-type="string">
            <text:p>Actualización de la autenticación centralizada de usuarios</text:p>
          </table:table-cell>
          <table:table-cell office:value-type="string" calcext:value-type="string">
            <text:p>Aborda la evolución de autenticación de forma general sin arquitectura concret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evolucionar la autenticación centralizada hacia una plataforma modern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6</text:p>
          </table:table-cell>
          <table:table-cell office:value-type="string" calcext:value-type="string">
            <text:p>Mantenimiento de la autenticación centralizada de usuarios</text:p>
          </table:table-cell>
          <table:table-cell office:value-type="string" calcext:value-type="string">
            <text:p>Menciona supervisión y mantenimiento de identidad sin procedimientos operativos detall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rta modernización y gobierno IAM como valor añadido del manten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7</text:p>
          </table:table-cell>
          <table:table-cell office:value-type="string" calcext:value-type="string">
            <text:p>Gestión de servicios para la sincronización de usuarios</text:p>
          </table:table-cell>
          <table:table-cell office:value-type="string" calcext:value-type="string">
            <text:p>Reconoce la sincronización de identidades pero no concreta mecanismos ni contro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una plataforma de gobierno y observabilidad de identidad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8</text:p>
          </table:table-cell>
          <table:table-cell office:value-type="string" calcext:value-type="string">
            <text:p>Supervisión de usuarios de aplicaciones externas</text:p>
          </table:table-cell>
          <table:table-cell office:value-type="string" calcext:value-type="string">
            <text:p>Plantea supervisión de usuarios y permisos sin detalle técnico verificabl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control IAM para supervisar identidades y accesos de aplicaciones extern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9</text:p>
          </table:table-cell>
          <table:table-cell office:value-type="string" calcext:value-type="string">
            <text:p>Soporte técnico en entornos de preproducción</text:p>
          </table:table-cell>
          <table:table-cell office:value-type="string" calcext:value-type="string">
            <text:p>Menciona acompañamiento y validación de preproducción sin criterios de aceptación defini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validación automatizada y gobernada de aplicaciones en preproduc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0</text:p>
          </table:table-cell>
          <table:table-cell office:value-type="string" calcext:value-type="string">
            <text:p>Despliegue de aplicaciones externas en producción</text:p>
          </table:table-cell>
          <table:table-cell office:value-type="string" calcext:value-type="string">
            <text:p>Describe coordinación y validación de despliegues sin procedimient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a un modelo DevSecOps para despliegues de aplicaciones extern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1</text:p>
          </table:table-cell>
          <table:table-cell office:value-type="string" calcext:value-type="string">
            <text:p>Integración en el Gestor de Servidores de Bases de Datos</text:p>
          </table:table-cell>
          <table:table-cell office:value-type="string" calcext:value-type="string">
            <text:p>No identifica una propuesta específica para integrar con el gestor corporativo de BBDD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administración centralizada y automatizada de los servidores de bases de dat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2</text:p>
          </table:table-cell>
          <table:table-cell office:value-type="string" calcext:value-type="string">
            <text:p>Estudio de los recursos solicitados</text:p>
          </table:table-cell>
          <table:table-cell office:value-type="string" calcext:value-type="string">
            <text:p>Contempla estudios de capacidad pero sin metodología de dimensionamiento concret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capacity planning para estudiar y dimensionar los recursos solicitad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3</text:p>
          </table:table-cell>
          <table:table-cell office:value-type="string" calcext:value-type="string">
            <text:p>Solicitud de los recursos necesarios</text:p>
          </table:table-cell>
          <table:table-cell office:value-type="string" calcext:value-type="string">
            <text:p>Aborda la gestión de solicitudes de recursos de forma general y sin flujos defini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provisionamiento automatizado y gobernado de los recursos necesari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4</text:p>
          </table:table-cell>
          <table:table-cell office:value-type="string" calcext:value-type="string">
            <text:p>Bastionado de los recursos solicitados</text:p>
          </table:table-cell>
          <table:table-cell office:value-type="string" calcext:value-type="string">
            <text:p>No se identifica una solución específica de bastionado de sistema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 hardening alineado con CIS y ENS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5</text:p>
          </table:table-cell>
          <table:table-cell office:value-type="string" calcext:value-type="string">
            <text:p>Instalación de la paquetería y gestión de dependencias</text:p>
          </table:table-cell>
          <table:table-cell office:value-type="string" calcext:value-type="string">
            <text:p>Menciona actualización de componentes sin control detallado de dependenci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rta automatización DevSecOps e infraestructura como código para dependenci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6</text:p>
          </table:table-cell>
          <table:table-cell office:value-type="string" calcext:value-type="string">
            <text:p>Configuración del entorno</text:p>
          </table:table-cell>
          <table:table-cell office:value-type="string" calcext:value-type="string">
            <text:p>Incluye parametrización y soporte de configuración sin procedimientos reproducib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utomatización de configuraciones mediante IaC y auditoría automátic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7</text:p>
          </table:table-cell>
          <table:table-cell office:value-type="string" calcext:value-type="string">
            <text:p>Soporte para la integración con el LDAP de la plataforma EducaMadrid</text:p>
          </table:table-cell>
          <table:table-cell office:value-type="string" calcext:value-type="string">
            <text:p>Menciona integración con directorio sin definir flujos ni mecanismos LDAP concre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evolucionar LDAP hacia un modelo de Identity Governanc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8</text:p>
          </table:table-cell>
          <table:table-cell office:value-type="string" calcext:value-type="string">
            <text:p>Soporte para la integración con el sistema de correo de la plataforma EducaMadrid</text:p>
          </table:table-cell>
          <table:table-cell office:value-type="string" calcext:value-type="string">
            <text:p>Reconoce la integración de correo sin configurar protocolos ni validaciones concret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integración con correo y mejoras de seguridad SPF y DKIM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19</text:p>
          </table:table-cell>
          <table:table-cell office:value-type="string" calcext:value-type="string">
            <text:p>Soporte para la integración con distintas BBDD de la plataforma EducaMadrid</text:p>
          </table:table-cell>
          <table:table-cell office:value-type="string" calcext:value-type="string">
            <text:p>Plantea integración con repositorios de datos sin arquitectura ni mecanismos específic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gobierno y observabilidad de datos para las integraciones de BBD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0</text:p>
          </table:table-cell>
          <table:table-cell office:value-type="string" calcext:value-type="string">
            <text:p>Soporte para la integración del CMDB de la plataforma EducaMadrid</text:p>
          </table:table-cell>
          <table:table-cell office:value-type="string" calcext:value-type="string">
            <text:p>Menciona trazabilidad y activos sin integración concreta con el CMDB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rta gestión avanzada del CMDB para la integración y trazabilidad de activ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1</text:p>
          </table:table-cell>
          <table:table-cell office:value-type="string" calcext:value-type="string">
            <text:p>Documentación del proyecto externo</text:p>
          </table:table-cell>
          <table:table-cell office:value-type="string" calcext:value-type="string">
            <text:p>Cubre gestión documental y transferencia de conocimiento sin entregables ni control detall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a gobierno del conocimiento para la documentación de proyectos extern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2</text:p>
          </table:table-cell>
          <table:table-cell office:value-type="string" calcext:value-type="string">
            <text:p>Gestión del riesgo del proyecto externo</text:p>
          </table:table-cell>
          <table:table-cell office:value-type="string" calcext:value-type="string">
            <text:p>Desarrolla gestión de riesgos e incorpora metodología MAGERIT con limitaciones de concre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uye metodología MAGERIT para identificar tratar y seguir los riesg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3</text:p>
          </table:table-cell>
          <table:table-cell office:value-type="string" calcext:value-type="string">
            <text:p>Implementación de sistemas de Backups y procedimiento de Disaster Recovery</text:p>
          </table:table-cell>
          <table:table-cell office:value-type="string" calcext:value-type="string">
            <text:p>Describe copias y recuperación ante desastres de forma razonable pero sin métricas de valid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repositorios WORM y replicación entre CPDs para respaldo y recuper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4</text:p>
          </table:table-cell>
          <table:table-cell office:value-type="string" calcext:value-type="string">
            <text:p>Implementación de monitorización básica</text:p>
          </table:table-cell>
          <table:table-cell office:value-type="string" calcext:value-type="string">
            <text:p>Menciona monitorización de infraestructuras y servicios sin definir herramientas ni indicador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re monitorización básica pero sin propuesta de mejora ni suficiente desarrollo técnic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5</text:p>
          </table:table-cell>
          <table:table-cell office:value-type="string" calcext:value-type="string">
            <text:p>Implementación de monitorización avanzada</text:p>
          </table:table-cell>
          <table:table-cell office:value-type="string" calcext:value-type="string">
            <text:p>Implanta monitorización avanzada con OpenNMS, Cacti, alertas, análisis de rendimiento y scripts personalizad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orta inteligencia operacional e integración con SOC para monitorización avanz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6</text:p>
          </table:table-cell>
          <table:table-cell office:value-type="string" calcext:value-type="string">
            <text:p>Implementación de servicios de ciberseguridad básicos</text:p>
          </table:table-cell>
          <table:table-cell office:value-type="string" calcext:value-type="string">
            <text:p>Cubre control de accesos con 2FA, certificados, TLS, vulnerabilidades y revisiones básicas de seguridad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MFA unificado hardening STIC y reporting ENS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7</text:p>
          </table:table-cell>
          <table:table-cell office:value-type="string" calcext:value-type="string">
            <text:p>Implementación de servicios de ciberseguridad avanzados</text:p>
          </table:table-cell>
          <table:table-cell office:value-type="string" calcext:value-type="string">
            <text:p>Integra SIEM Open Source, escaneos automatizados, hardening y alertas avanzadas de seguridad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ne defensa activa continua y observabilidad inteligente de la segur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8</text:p>
          </table:table-cell>
          <table:table-cell office:value-type="string" calcext:value-type="string">
            <text:p>Actualización de los sistemas operativos</text:p>
          </table:table-cell>
          <table:table-cell office:value-type="string" calcext:value-type="string">
            <text:p>Aborda actualizaciones de sistemas operativos pero sin planificación y métricas suficientemente concreta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ine gestión proactiva del ciclo de vida tecnológico de los sistemas operativ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29</text:p>
          </table:table-cell>
          <table:table-cell office:value-type="string" calcext:value-type="string">
            <text:p>Gestión y seguimiento del proyecto</text:p>
          </table:table-cell>
          <table:table-cell office:value-type="string" calcext:value-type="string">
            <text:p>Propone gobernanza y seguimiento con cobertura adecuada pero limitada en indicadores verificabl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orta un modelo integral de gobierno técnico y seguimiento del proyec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0</text:p>
          </table:table-cell>
          <table:table-cell office:value-type="string" calcext:value-type="string">
            <text:p>Segmentación de la actual red de servidores</text:p>
          </table:table-cell>
          <table:table-cell office:value-type="string" calcext:value-type="string">
            <text:p>Define segmentación de red, Zero Trust, VPN específica, MFA y certificados para accesos administrativo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ciona microsegmentación y seguridad adaptativa sin desarrollo suficientemente concret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yectos de Sistemas Externos (ESIS)</text:p>
          </table:table-cell>
          <table:table-cell office:value-type="string" calcext:value-type="string">
            <text:p>ESIS31</text:p>
          </table:table-cell>
          <table:table-cell office:value-type="string" calcext:value-type="string">
            <text:p>Optimización de la infraestructura de virtualización del entorno</text:p>
          </table:table-cell>
          <table:table-cell office:value-type="string" calcext:value-type="string">
            <text:p>Revisa y optimiza hosts, recursos, alta disponibilidad, almacenamiento, seguridad y capacidad de virtualizació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evolucionar la virtualización para escenarios preparados para I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1</text:p>
          </table:table-cell>
          <table:table-cell office:value-type="string" calcext:value-type="string">
            <text:p>Realización de Auditorías/Pentesting Web</text:p>
          </table:table-cell>
          <table:table-cell office:value-type="string" calcext:value-type="string">
            <text:p>Incluye pentesting y seguimiento de vulnerabilidades con limitaciones de detalle metodológic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validación ofensiva continua para auditorías y pentesting web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2</text:p>
          </table:table-cell>
          <table:table-cell office:value-type="string" calcext:value-type="string">
            <text:p>Gestión de logs de las aplicaciones Web</text:p>
          </table:table-cell>
          <table:table-cell office:value-type="string" calcext:value-type="string">
            <text:p>Aborda la gestión de logs sin concretar arquitectura de correlación ni indicador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ciona gestión de logs y evolución hacia SIEM sin suficiente desarrollo técnic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de aplicaciones WEB (ESEG)</text:p>
          </table:table-cell>
          <table:table-cell office:value-type="string" calcext:value-type="string">
            <text:p>ESEG3</text:p>
          </table:table-cell>
          <table:table-cell office:value-type="string" calcext:value-type="string">
            <text:p>Análisis y protección de la superficie de ataque</text:p>
          </table:table-cell>
          <table:table-cell office:value-type="string" calcext:value-type="string">
            <text:p>Propone supervisión de la superficie expuesta pero sin mecanismos técnicos detall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a Attack Surface Management para analizar y proteger la exposición web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ización de pruebas de desarrollo seguro de aplicaciones WEB (EDSA)</text:p>
          </table:table-cell>
          <table:table-cell office:value-type="string" calcext:value-type="string">
            <text:p>EDSA1</text:p>
          </table:table-cell>
          <table:table-cell office:value-type="string" calcext:value-type="string">
            <text:p>Análisis de Código Web</text:p>
          </table:table-cell>
          <table:table-cell office:value-type="string" calcext:value-type="string">
            <text:p>Incluye análisis automatizado de código con cobertura adecuada pero validación limitad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implantar DevSecOps para integrar el análisis de código segur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ización de pruebas de desarrollo seguro de aplicaciones WEB (EDSA)</text:p>
          </table:table-cell>
          <table:table-cell office:value-type="string" calcext:value-type="string">
            <text:p>EDSA2</text:p>
          </table:table-cell>
          <table:table-cell office:value-type="string" calcext:value-type="string">
            <text:p>Ayuda al Desarrollo Seguro de Código Web</text:p>
          </table:table-cell>
          <table:table-cell office:value-type="string" calcext:value-type="string">
            <text:p>Menciona asesoramiento y revisión de desarrollo seguro sin procedimientos de acompañamiento concre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seguridad integrada en el ciclo de desarrollo como valor añadi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gestión del programa de Bug Bounty (EBBO)</text:p>
          </table:table-cell>
          <table:table-cell office:value-type="string" calcext:value-type="string">
            <text:p>EBBO1</text:p>
          </table:table-cell>
          <table:table-cell office:value-type="string" calcext:value-type="string">
            <text:p>Mantenimiento y gestión del programa de Bug Bounty</text:p>
          </table:table-cell>
          <table:table-cell office:value-type="string" calcext:value-type="string">
            <text:p>Cubre la gestión del Bug Bounty con un desarrollo operativo general y poco detall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rda el mantenimiento del Bug Bounty sin suficiente concreción técnic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_ii_exteriores.A1:tareas_anexo_ii_exteriores.XF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3T21:25:18.584984278</dc:date>
    <meta:editing-duration>PT3M26S</meta:editing-duration>
    <meta:editing-cycles>1</meta:editing-cycles>
    <meta:document-statistic meta:table-count="1" meta:cell-count="378" meta:object-count="0"/>
    <meta:generator>LibreOffice/26.2.4.2$Linux_X86_64 LibreOffice_project/3346a99e6b841765b75a9b29714a5b95c6761ce3</meta:generator>
  </office:meta>
</office:document-meta>
</file>