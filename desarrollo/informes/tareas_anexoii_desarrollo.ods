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7.743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6.165cm"/>
    </style:style>
    <style:style style:name="co4" style:family="table-column">
      <style:table-column-properties fo:break-before="auto" style:column-width="27.494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2.835cm"/>
    </style:style>
    <style:style style:name="co7" style:family="table-column">
      <style:table-column-properties fo:break-before="auto" style:column-width="15.45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4.42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20.112cm"/>
    </style:style>
    <style:style style:name="co13" style:family="table-column">
      <style:table-column-properties fo:break-before="auto" style:column-width="15.616cm"/>
    </style:style>
    <style:style style:name="co14" style:family="table-column">
      <style:table-column-properties fo:break-before="auto" style:column-width="10.5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50"/>
      <table:table table:name="tareas_anexoii_desarroll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15" table:number-columns-repeated="16360" table:default-cell-style-name="ce1"/>
        <table:table-row table:style-name="ro1">
          <table:table-cell office:value-type="string" calcext:value-type="string">
            <text:p>PROYECTO (GRUPO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BRE DEL SUBPROYECTO</text:p>
          </table:table-cell>
          <table:table-cell office:value-type="string" calcext:value-type="string">
            <text:p>desc_empresa_n</text:p>
          </table:table-cell>
          <table:table-cell office:value-type="string" calcext:value-type="string">
            <text:p>val_empresa_n</text:p>
          </table:table-cell>
          <table:table-cell office:value-type="string" calcext:value-type="string">
            <text:p>desc_empresa_s</text:p>
          </table:table-cell>
          <table:table-cell office:value-type="string" calcext:value-type="string">
            <text:p>val_empresa_s</text:p>
          </table:table-cell>
          <table:table-cell office:value-type="string" calcext:value-type="string">
            <text:p>desc_empresa_u</text:p>
          </table:table-cell>
          <table:table-cell office:value-type="string" calcext:value-type="string">
            <text:p>val_empresa_u</text:p>
          </table:table-cell>
          <table:table-cell office:value-type="string" calcext:value-type="string">
            <text:p>grado_empresa_n</text:p>
          </table:table-cell>
          <table:table-cell office:value-type="string" calcext:value-type="string">
            <text:p>nivel_empresa_n</text:p>
          </table:table-cell>
          <table:table-cell office:value-type="string" calcext:value-type="string">
            <text:p>valor_añadido_empresa_n</text:p>
          </table:table-cell>
          <table:table-cell office:value-type="string" calcext:value-type="string">
            <text:p>error_empresa_n</text:p>
          </table:table-cell>
          <table:table-cell office:value-type="string" calcext:value-type="string">
            <text:p>observación_empresa_n</text:p>
          </table:table-cell>
          <table:table-cell office:value-type="string" calcext:value-type="string">
            <text:p>grado_empresa_s</text:p>
          </table:table-cell>
          <table:table-cell office:value-type="string" calcext:value-type="string">
            <text:p>nivel_empresa_s</text:p>
          </table:table-cell>
          <table:table-cell office:value-type="string" calcext:value-type="string">
            <text:p>valor_añadido_empresa_s</text:p>
          </table:table-cell>
          <table:table-cell office:value-type="string" calcext:value-type="string">
            <text:p>error_empresa_s</text:p>
          </table:table-cell>
          <table:table-cell office:value-type="string" calcext:value-type="string">
            <text:p>observación_empresa_s</text:p>
          </table:table-cell>
          <table:table-cell office:value-type="string" calcext:value-type="string">
            <text:p>grado_empresa_u</text:p>
          </table:table-cell>
          <table:table-cell office:value-type="string" calcext:value-type="string">
            <text:p>nivel_empresa_u</text:p>
          </table:table-cell>
          <table:table-cell office:value-type="string" calcext:value-type="string">
            <text:p>valor_añadido_empresa_u</text:p>
          </table:table-cell>
          <table:table-cell office:value-type="string" calcext:value-type="string">
            <text:p>error_empresa_u</text:p>
          </table:table-cell>
          <table:table-cell office:value-type="string" calcext:value-type="string">
            <text:p>observación_empresa_u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1</text:p>
          </table:table-cell>
          <table:table-cell office:value-type="string" calcext:value-type="string">
            <text:p>Borrado y cambios de IDs de usuario</text:p>
          </table:table-cell>
          <table:table-cell office:value-type="string" calcext:value-type="string">
            <text:p>Propuesta técnica con error técnico relevante: LDAP mal interpret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modo “simulación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LDAP mal interpretado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o “simulación”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2</text:p>
          </table:table-cell>
          <table:table-cell office:value-type="string" calcext:value-type="string">
            <text:p>Cambios de nombre de centro</text:p>
          </table:table-cell>
          <table:table-cell office:value-type="string" calcext:value-type="string">
            <text:p>Propuesta técnica con error técnico relevante: uso incorrecto CalDAV vs 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so incorrecto CalDAV vs ICS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3</text:p>
          </table:table-cell>
          <table:table-cell office:value-type="string" calcext:value-type="string">
            <text:p>Tareas tras traslado CPD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4</text:p>
          </table:table-cell>
          <table:table-cell office:value-type="string" calcext:value-type="string">
            <text:p>Modo oscuro/clar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5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n valor añadido: mejora de seguridad y sopor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jora de seguridad y soporte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6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n valor añadido: generación automática de una especificación OpenAP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eración automática de una especificación OpenAPI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7</text:p>
          </table:table-cell>
          <table:table-cell office:value-type="string" calcext:value-type="string">
            <text:p>Securización LDAP/BBDD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verificador automático de secretos expue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ificador automático de secretos expuestos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joras y mantenimientos transversales (TRA)</text:p>
          </table:table-cell>
          <table:table-cell office:value-type="string" calcext:value-type="string">
            <text:p>TRA8</text:p>
          </table:table-cell>
          <table:table-cell office:value-type="string" calcext:value-type="string">
            <text:p>Calendario escolar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odo identificativo único para eventos de centro o de calendario esco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o identificativo único para eventos de centro o de calendario escolar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</text:p>
          </table:table-cell>
          <table:table-cell office:value-type="string" calcext:value-type="string">
            <text:p>Actualización Moodle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n valor añadido: “informe de salud post-upgrade” por is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“informe de salud post-upgrade” por isla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ctualización PHP y S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perfiles para tráfico web y tareas intern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files para tráfico web y tareas internas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ctualización plugin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ficha técnica por plugin con “decisión de ciclo de vida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cha técnica por plugin con “decisión de ciclo de vida”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Seguridad y rendimiento</text:p>
          </table:table-cell>
          <table:table-cell office:value-type="string" calcext:value-type="string">
            <text:p>Propuesta técnica con error técnico relevante: MySQL vs PostgreSQ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cuadro de mando técnico de salud Mood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ySQL vs PostgreSQL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adro de mando técnico de salud Moodle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5</text:p>
          </table:table-cell>
          <table:table-cell office:value-type="string" calcext:value-type="string">
            <text:p>Integracione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Interfaz y experiencia de usuari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odo compac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o compacto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7</text:p>
          </table:table-cell>
          <table:table-cell office:value-type="string" calcext:value-type="string">
            <text:p>Desarrollo y prueba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8</text:p>
          </table:table-cell>
          <table:table-cell office:value-type="string" calcext:value-type="string">
            <text:p>Mantenimiento y soporte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calendario técnico de “campaña de inicio de curso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endario técnico de “campaña de inicio de curso”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9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odo “dry-run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o “dry-run”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0</text:p>
          </table:table-cell>
          <table:table-cell office:value-type="string" calcext:value-type="string">
            <text:p>Plugin eXeLearning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prueba automática de conectivid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ueba automática de conectividad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1</text:p>
          </table:table-cell>
          <table:table-cell office:value-type="string" calcext:value-type="string">
            <text:p>IA en Moodle</text:p>
          </table:table-cell>
          <table:table-cell office:value-type="string" calcext:value-type="string">
            <text:p>Propuesta técnica con error técnico relevante: procesos IA síncronos incorrec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notificación por correo al doce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rocesos IA síncronos incorrectos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ificación por correo al docente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2</text:p>
          </table:table-cell>
          <table:table-cell office:value-type="string" calcext:value-type="string">
            <text:p>Generador de text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opción de generar textos en distintos idiomas con 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ción de generar textos en distintos idiomas con IA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3</text:p>
          </table:table-cell>
          <table:table-cell office:value-type="string" calcext:value-type="string">
            <text:p>POC RAG por curs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4</text:p>
          </table:table-cell>
          <table:table-cell office:value-type="string" calcext:value-type="string">
            <text:p>Integración NIA alumn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ostrar NIA enmascarado cuando no sea imprescindible verlo comple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strar NIA enmascarado cuando no sea imprescindible verlo completo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5</text:p>
          </table:table-cell>
          <table:table-cell office:value-type="string" calcext:value-type="string">
            <text:p>SSO en Moodle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SSO funcional desde el aplicativo móv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O funcional desde el aplicativo móvil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6</text:p>
          </table:table-cell>
          <table:table-cell office:value-type="string" calcext:value-type="string">
            <text:p>Plugin Kuet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prueba de carga específica para Ku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ueba de carga específica para Kuet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7</text:p>
          </table:table-cell>
          <table:table-cell office:value-type="string" calcext:value-type="string">
            <text:p>Plugin Offline Quiz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odo de previsualizació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o de previsualización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8</text:p>
          </table:table-cell>
          <table:table-cell office:value-type="string" calcext:value-type="string">
            <text:p>Integración calificacione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simulación previa “validar sin enviar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ulación previa “validar sin enviar”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9</text:p>
          </table:table-cell>
          <table:table-cell office:value-type="string" calcext:value-type="string">
            <text:p>Borrado de curs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añadir estimación previa de impac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ñadir estimación previa de impacto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20</text:p>
          </table:table-cell>
          <table:table-cell office:value-type="string" calcext:value-type="string">
            <text:p>Moosh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21</text:p>
          </table:table-cell>
          <table:table-cell office:value-type="string" calcext:value-type="string">
            <text:p>Moodler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añadir scopes de API por tipo de operació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ñadir scopes de API por tipo de operación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ubtítulos multiidioma</text:p>
          </table:table-cell>
          <table:table-cell office:value-type="string" calcext:value-type="string">
            <text:p>Propuesta técnica con error técnico relevante: error BB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incorporar todos los subtítulos multiidioma en las búsquedas por Elas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error BBDD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orporar todos los subtítulos multiidioma en las búsquedas por Elastic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Elastic en búsquedas</text:p>
          </table:table-cell>
          <table:table-cell office:value-type="string" calcext:value-type="string">
            <text:p>Propuesta técnica con error técnico relevante: omisión funcional crít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“modo explicación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misión funcional crítica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“modo explicación”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3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limitar la comprobación de sesión activa en ciertos cas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ar la comprobación de sesión activa en ciertos casos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4</text:p>
          </table:table-cell>
          <table:table-cell office:value-type="string" calcext:value-type="string">
            <text:p>Scratch editor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guardado de versiones anteriores del proyec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ardado de versiones anteriores del proyecto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5</text:p>
          </table:table-cell>
          <table:table-cell office:value-type="string" calcext:value-type="string">
            <text:p>eXeLearning 3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comprobación previa del ZIP e informe al usuar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robación previa del ZIP e informe al usuario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6</text:p>
          </table:table-cell>
          <table:table-cell office:value-type="string" calcext:value-type="string">
            <text:p>Bajas de usuari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odo “simulación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o “simulación”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7</text:p>
          </table:table-cell>
          <table:table-cell office:value-type="string" calcext:value-type="string">
            <text:p>Subidas JPEG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ostrar antes de enviar validación ligera en cliente para extensiones admiti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strar antes de enviar validación ligera en cliente para extensiones admitidas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8</text:p>
          </table:table-cell>
          <table:table-cell office:value-type="string" calcext:value-type="string">
            <text:p>Páginas de error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bloque “qué puedo hacer ahora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oque “qué puedo hacer ahora”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9</text:p>
          </table:table-cell>
          <table:table-cell office:value-type="string" calcext:value-type="string">
            <text:p>Subtítulos en audi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transcripción multiidio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nscripción multiidioma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10</text:p>
          </table:table-cell>
          <table:table-cell office:value-type="string" calcext:value-type="string">
            <text:p>IA en víde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indicador interno de confian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técnico general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icador interno de confianza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técnico general evaluable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ateca (MED)</text:p>
          </table:table-cell>
          <table:table-cell office:value-type="string" calcext:value-type="string">
            <text:p>MED11</text:p>
          </table:table-cell>
          <table:table-cell office:value-type="string" calcext:value-type="string">
            <text:p>Refactorización de códig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apa vivo de deuda técn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pa vivo de deuda técnica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rreo web (COR)</text:p>
          </table:table-cell>
          <table:table-cell office:value-type="string" calcext:value-type="string">
            <text:p>COR1</text:p>
          </table:table-cell>
          <table:table-cell office:value-type="string" calcext:value-type="string">
            <text:p>Adaptación a última versión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n valor añadido: pantalla de diagnósti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talla de diagnóstico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rreo web (COR)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IA en correoweb</text:p>
          </table:table-cell>
          <table:table-cell office:value-type="string" calcext:value-type="string">
            <text:p>Propuesta técnica con error técnico relevante: falta de conocimiento del entorno de EducaMadrid, que usa xAI modificado, y propuesta de desarrollo desde cero innecesa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botón “el resumen no es correcto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falta de conocimiento del entorno de EducaMadrid, que usa xAI modificado, y propuesta de desarrollo desde cero innecesario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tón “el resumen no es correcto”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rreo Web (COR)</text:p>
          </table:table-cell>
          <table:table-cell office:value-type="string" calcext:value-type="string">
            <text:p>COR3</text:p>
          </table:table-cell>
          <table:table-cell office:value-type="string" calcext:value-type="string">
            <text:p>Redacción de correos</text:p>
          </table:table-cell>
          <table:table-cell office:value-type="string" calcext:value-type="string">
            <text:p>Propuesta técnica con error técnico relevante: falta de conocimiento del entorno de EducaMadrid, que usa xAI modificado, y propuesta de desarrollo desde cero innecesa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opción “mantener tono institucional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falta de conocimiento del entorno de EducaMadrid, que usa xAI modificado, y propuesta de desarrollo desde cero innecesario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ción “mantener tono institucional”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rreo Web (COR)</text:p>
          </table:table-cell>
          <table:table-cell office:value-type="string" calcext:value-type="string">
            <text:p>COR4</text:p>
          </table:table-cell>
          <table:table-cell office:value-type="string" calcext:value-type="string">
            <text:p>Reescritura de correos</text:p>
          </table:table-cell>
          <table:table-cell office:value-type="string" calcext:value-type="string">
            <text:p>Propuesta técnica con error técnico relevante: falta de conocimiento del entorno de EducaMadrid, que usa xAI modificado, y propuesta de desarrollo desde cero innecesa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opción “no cambiar información factual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falta de conocimiento del entorno de EducaMadrid, que usa xAI modificado, y propuesta de desarrollo desde cero innecesario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ción “no cambiar información factual”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1</text:p>
          </table:table-cell>
          <table:table-cell office:value-type="string" calcext:value-type="string">
            <text:p>Evolución del servicio Cloud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2</text:p>
          </table:table-cell>
          <table:table-cell office:value-type="string" calcext:value-type="string">
            <text:p>IA en Cloud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1</text:p>
          </table:table-cell>
          <table:table-cell office:value-type="string" calcext:value-type="string">
            <text:p>Mantenimiento y actualización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panel técnico interno de versiones por compone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el técnico interno de versiones por componente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2</text:p>
          </table:table-cell>
          <table:table-cell office:value-type="string" calcext:value-type="string">
            <text:p>Licencias de plugins/tema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aviso de licencias a punto de caducar o pendientes de activ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viso de licencias a punto de caducar o pendientes de activar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3</text:p>
          </table:table-cell>
          <table:table-cell office:value-type="string" calcext:value-type="string">
            <text:p>Configuración WAF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procedimiento de correlación entre eventos del WAF y logs de WordP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general: WAF y seguridad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cedimiento de correlación entre eventos del WAF y logs de WordPress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eral: WAF y seguridad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4</text:p>
          </table:table-cell>
          <table:table-cell office:value-type="string" calcext:value-type="string">
            <text:p>Sustitución captcha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ejoras en captc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joras en captcha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ordPress Multisite (WPM)</text:p>
          </table:table-cell>
          <table:table-cell office:value-type="string" calcext:value-type="string">
            <text:p>WPM5</text:p>
          </table:table-cell>
          <table:table-cell office:value-type="string" calcext:value-type="string">
            <text:p>Integración SS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política individualizada de 2F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general: caso de uso operativ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lítica individualizada de 2FA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eral: caso de uso operativ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Videoconferencia y Retransmisión (VID)</text:p>
          </table:table-cell>
          <table:table-cell office:value-type="string" calcext:value-type="string">
            <text:p>VID1</text:p>
          </table:table-cell>
          <table:table-cell office:value-type="string" calcext:value-type="string">
            <text:p>Wowza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n valor añadido: recolector de métricas por emisió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colector de métricas por emisión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Videoconferencia y Retransmisión (VID)</text:p>
          </table:table-cell>
          <table:table-cell office:value-type="string" calcext:value-type="string">
            <text:p>VID2</text:p>
          </table:table-cell>
          <table:table-cell office:value-type="string" calcext:value-type="string">
            <text:p>Jitsi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n valor añadido: regla de admisión progresiva para salas de invitad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gla de admisión progresiva para salas de invitados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Videoconferencia y Retransmisión (VID)</text:p>
          </table:table-cell>
          <table:table-cell office:value-type="string" calcext:value-type="string">
            <text:p>VID3</text:p>
          </table:table-cell>
          <table:table-cell office:value-type="string" calcext:value-type="string">
            <text:p>BigBlueButton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aviso de caducidad de grabaciones para responsables de cent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viso de caducidad de grabaciones para responsables de centro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Videoconferencia y Retransmisión (VID)</text:p>
          </table:table-cell>
          <table:table-cell office:value-type="string" calcext:value-type="string">
            <text:p>VID4</text:p>
          </table:table-cell>
          <table:table-cell office:value-type="string" calcext:value-type="string">
            <text:p>PeerTube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plantilla de “evento de alta audiencia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tilla de “evento de alta audiencia”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MPieza (EMP)</text:p>
          </table:table-cell>
          <table:table-cell office:value-type="string" calcext:value-type="string">
            <text:p>EMP1</text:p>
          </table:table-cell>
          <table:table-cell office:value-type="string" calcext:value-type="string">
            <text:p>EMPieza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n valor añadido: dashboard de salud de diferentes compone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shboard de salud de diferentes componentes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LDAP</text:p>
          </table:table-cell>
          <table:table-cell office:value-type="string" calcext:value-type="string">
            <text:p>Consultas LDAP</text:p>
          </table:table-cell>
          <table:table-cell office:value-type="string" calcext:value-type="string">
            <text:p>Propuesta técnica con error técnico relevante: LDAP plano mal interpret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panel de “contraseñas temporales activas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general: seguridad e integración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LDAP plano mal interpretado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el de “contraseñas temporales activas”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eral: seguridad e integración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XeLearning (EXE)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eXeLearning Online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n valor añadido: plantilla “DUA ligero” y reproductor en la nube Nextcloud de 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tilla “DUA ligero” y reproductor en la nube Nextcloud de EM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Formularios (FOR)</text:p>
          </table:table-cell>
          <table:table-cell office:value-type="string" calcext:value-type="string">
            <text:p>FOR1</text:p>
          </table:table-cell>
          <table:table-cell office:value-type="string" calcext:value-type="string">
            <text:p>Formulari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informe de salud de Formulari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orme de salud de Formularios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uscador de AV y cursos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Buscador de aulas y curs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odo de “búsquedas frecuentes sin resultados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general: optimización búsqueda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o de “búsquedas frecuentes sin resultados”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eral: optimización búsquedas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nimalandia (ANI)</text:p>
          </table:table-cell>
          <table:table-cell office:value-type="string" calcext:value-type="string">
            <text:p>ANI1</text:p>
          </table:table-cell>
          <table:table-cell office:value-type="string" calcext:value-type="string">
            <text:p>Animalandia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crear un “mapa de deuda técnica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r un “mapa de deuda técnica”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incronización de usuarios (SYN)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incronización de usuarios</text:p>
          </table:table-cell>
          <table:table-cell office:value-type="string" calcext:value-type="string">
            <text:p>Propuesta técnica con error técnico relevante: modelo de datos incorrec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evolución hacia API de Raí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odelo de datos incorrecto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olución hacia API de Raíces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ortal CAU (CAU)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Portal CAU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panel de verificación postactualizació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el de verificación postactualización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ducaSAAC (EDU)</text:p>
          </table:table-cell>
          <table:table-cell office:value-type="string" calcext:value-type="string">
            <text:p>EDU</text:p>
          </table:table-cell>
          <table:table-cell/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Biblioteca interna ligera de seguridad para EducaSAAC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blioteca interna ligera de seguridad para EducaSAAC,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uzón anónimo (BAN)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uzón anónimo</text:p>
          </table:table-cell>
          <table:table-cell office:value-type="string" calcext:value-type="string">
            <text:p>Propuesta técnica con error técnico relevante: tecnología Java incorrec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panel de comprobación prev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tecnología Java incorrecta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el de comprobación previa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DTIC</text:p>
          </table:table-cell>
          <table:table-cell/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informe previo en HTML y CS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orme previo en HTML y CSV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eguimientos (SEG)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uimient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panel de salud de edició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el de salud de edición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lbor (ALB)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or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consola de revisión de respuestas sin datos persona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general: caso IA detallad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ola de revisión de respuestas sin datos personales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eral: caso IA detallad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visos (AVI)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isos</text:p>
          </table:table-cell>
          <table:table-cell office:value-type="string" calcext:value-type="string">
            <text:p>Propuesta técnica con error técnico relevante: tecnología incorrec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uesta técnica con valor añadido: validación de seguridad prev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UY 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tecnología incorrecta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idación de seguridad previa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Foros (FOROS)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or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autencitación contra S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encitación contra SSO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oletines (BOL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etine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validación previa al enví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idación previa al envío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yuda (AYU)</text:p>
          </table:table-cell>
          <table:table-cell office:value-type="string" calcext:value-type="string">
            <text:p>AYU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ortal (POR)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endpoint de validación prev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dpoint de validación previa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eb estática (WES)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b estática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matriz de páginas crític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triz de páginas críticas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Framework de interfaz (IFZ)</text:p>
          </table:table-cell>
          <table:table-cell office:value-type="string" calcext:value-type="string">
            <text:p>IFZ</text:p>
          </table:table-cell>
          <table:table-cell office:value-type="string" calcext:value-type="string">
            <text:p>Framework de interfaz</text:p>
          </table:table-cell>
          <table:table-cell office:value-type="string" calcext:value-type="string">
            <text:p>Propuesta técnica incluida con desarrollo suficiente: Desarrollo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con valor añadido: catálogo vivo de compone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suficiente: Desarrollo general: framework UI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evaluable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tálogo vivo de componentes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eral: framework UI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ntornos MAX (MAX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ntornos MAX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Gestión de títulos (GES)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Gestión de títulos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validador previo de fiche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idador previo de ficheros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edidas de uso web (USO)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Medidas de uso web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instalación de rybbit contra el SSO y script de generación de entorno para los centros solicitad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alación de rybbit contra el SSO y script de generación de entorno para los centros solicitados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amood (MAM)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Mamood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con valor añadido: orquestador ligero de scripts accesible por VP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questador ligero de scripts accesible por VPN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MLab (EML)</text:p>
          </table:table-cell>
          <table:table-cell office:value-type="string" calcext:value-type="string">
            <text:p>EML</text:p>
          </table:table-cell>
          <table:table-cell office:value-type="string" calcext:value-type="string">
            <text:p>EMLab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biesWeb (ABI)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AbiesWeb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suficiente: Solución concreta y evaluab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uesta técnica incluida con desarrollo insuficiente: Mención sin desarrollo técnico 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ción concreta y evaluable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nción sin desarrollo técnico completo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ekan (WEK)</text:p>
          </table:table-cell>
          <table:table-cell office:value-type="string" calcext:value-type="string">
            <text:p>WEK1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insuficiente y valor añadido: Tratamiento agregado; Docker Compose con backup y rollback probad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tamiento agregado; Docker Compose con backup y rollback probado.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ekan (WEK)</text:p>
          </table:table-cell>
          <table:table-cell office:value-type="string" calcext:value-type="string">
            <text:p>WEK2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insuficiente y valor añadido: Tratamiento agregado; Docker Compose con backup y rollback probad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tamiento agregado; Docker Compose con backup y rollback probado.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ekan (WEK)</text:p>
          </table:table-cell>
          <table:table-cell office:value-type="string" calcext:value-type="string">
            <text:p>WEK3</text:p>
          </table:table-cell>
          <table:table-cell office:value-type="string" calcext:value-type="string">
            <text:p>Configuración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insuficiente y valor añadido: Tratamiento agregado; Docker Compose con backup y rollback probad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tamiento agregado; Docker Compose con backup y rollback probado.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ekan (WEK)</text:p>
          </table:table-cell>
          <table:table-cell office:value-type="string" calcext:value-type="string">
            <text:p>WEK4</text:p>
          </table:table-cell>
          <table:table-cell office:value-type="string" calcext:value-type="string">
            <text:p>Interfaz</text:p>
          </table:table-cell>
          <table:table-cell office:value-type="string" calcext:value-type="string">
            <text:p>Propuesta técnica incluida con desarrollo insuficiente: Desarrollo genérico o incomple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uesta técnica incluida con desarrollo insuficiente y valor añadido: Tratamiento agregado; Docker Compose con backup y rollback probad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uesta técnica no incluida: La solución concreta queda pendiente o no aparece desarrollad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sarrollo genérico o incompleto.</text:p>
          </table:table-cell>
          <table:table-cell office:value-type="string" calcext:value-type="string">
            <text:p>INSUFICIENT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tamiento agregado; Docker Compose con backup y rollback probado.</text:p>
          </table:table-cell>
          <table:table-cell office:value-type="string" calcext:value-type="string">
            <text:p>NO INCLUIDA</text:p>
          </table:table-cell>
          <table:table-cell office:value-type="string" calcext:value-type="string">
            <text:p>MUY BAJ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solución concreta queda pendiente o no aparece desarrollada.</text:p>
          </table:table-cell>
          <table:table-cell table:number-columns-repeated="16360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areas_anexoii_desarrollo.A1:tareas_anexoii_desarrollo.XF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3T21:19:01.344637228</dc:date>
    <meta:editing-duration>PT2M13S</meta:editing-duration>
    <meta:editing-cycles>1</meta:editing-cycles>
    <meta:generator>LibreOffice/26.2.4.2$Linux_X86_64 LibreOffice_project/3346a99e6b841765b75a9b29714a5b95c6761ce3</meta:generator>
    <meta:document-statistic meta:table-count="1" meta:cell-count="2062" meta:object-count="0"/>
  </office:meta>
</office:document-meta>
</file>