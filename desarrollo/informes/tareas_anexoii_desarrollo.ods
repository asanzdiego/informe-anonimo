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7.743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6.165cm"/>
    </style:style>
    <style:style style:name="co4" style:family="table-column">
      <style:table-column-properties fo:break-before="auto" style:column-width="16.189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8.613cm"/>
    </style:style>
    <style:style style:name="co7" style:family="table-column">
      <style:table-column-properties fo:break-before="auto" style:column-width="11.9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table table:name="tareas_anexoii_desarroll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6375" table:default-cell-style-name="ce2"/>
        <table:table-row table:style-name="ro1">
          <table:table-cell table:style-name="ce1" office:value-type="string" calcext:value-type="string">
            <text:p>PROYECTO (GRUPO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 DEL SUBPROYECTO</text:p>
          </table:table-cell>
          <table:table-cell table:style-name="ce1" office:value-type="string" calcext:value-type="string">
            <text:p>desc_empresa_n</text:p>
          </table:table-cell>
          <table:table-cell table:style-name="ce1" office:value-type="string" calcext:value-type="string">
            <text:p>val_empresa_n</text:p>
          </table:table-cell>
          <table:table-cell table:style-name="ce1" office:value-type="string" calcext:value-type="string">
            <text:p>desc_empresa_s</text:p>
          </table:table-cell>
          <table:table-cell table:style-name="ce1" office:value-type="string" calcext:value-type="string">
            <text:p>val_empresa_s</text:p>
          </table:table-cell>
          <table:table-cell table:style-name="ce1" office:value-type="string" calcext:value-type="string">
            <text:p>desc_empresa_u</text:p>
          </table:table-cell>
          <table:table-cell table:style-name="ce1" office:value-type="string" calcext:value-type="string">
            <text:p>val_empresa_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1</text:p>
          </table:table-cell>
          <table:table-cell office:value-type="string" calcext:value-type="string">
            <text:p>Borrado y cambios de IDs de usuario</text:p>
          </table:table-cell>
          <table:table-cell office:value-type="string" calcext:value-type="string">
            <text:p>Plantea la sincronización, pero confunde el LDAP plano con un repositorio PostgreSQ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modo de simulación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2</text:p>
          </table:table-cell>
          <table:table-cell office:value-type="string" calcext:value-type="string">
            <text:p>Cambios de nombre de centro</text:p>
          </table:table-cell>
          <table:table-cell office:value-type="string" calcext:value-type="string">
            <text:p>Aborda calendarios, pero sitúa la sincronización en CalDAV en vez de I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3</text:p>
          </table:table-cell>
          <table:table-cell office:value-type="string" calcext:value-type="string">
            <text:p>Tareas tras traslado CPD</text:p>
          </table:table-cell>
          <table:table-cell office:value-type="string" calcext:value-type="string">
            <text:p>Incluye referencias generales al ENS y a medidas de seguridad, sin mecanismos concret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4</text:p>
          </table:table-cell>
          <table:table-cell office:value-type="string" calcext:value-type="string">
            <text:p>Modo oscuro/clar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5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Propuesta técnica incluida, con desarrollo general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6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Propuesta técnica incluida, con desarrollo general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generación automática de especificación OpenAPI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7</text:p>
          </table:table-cell>
          <table:table-cell office:value-type="string" calcext:value-type="string">
            <text:p>Securización LDAP/BBDD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verificador automático de secretos expuesto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8</text:p>
          </table:table-cell>
          <table:table-cell office:value-type="string" calcext:value-type="string">
            <text:p>Calendario escolar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identificador único para eventos de centro o calendario escola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Actualización Moodle</text:p>
          </table:table-cell>
          <table:table-cell office:value-type="string" calcext:value-type="string">
            <text:p>Reconoce la actualización de Moodle, sin detallar continuidad, preproducción ni prueba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informe de salud post-upgrade por isla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ctualización PHP y S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perfiles para tráfico web y tareas interna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ctualización plugin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ficha técnica por plugin con decisión de ciclo de vid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Seguridad y rendimiento</text:p>
          </table:table-cell>
          <table:table-cell office:value-type="string" calcext:value-type="string">
            <text:p>Propone Galera/MySQL, incompatible con la base PostgreSQL del sistem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cuadro de mando técnico de salud Moodl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5</text:p>
          </table:table-cell>
          <table:table-cell office:value-type="string" calcext:value-type="string">
            <text:p>Integracione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Interfaz y experiencia de usuari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odo compact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7</text:p>
          </table:table-cell>
          <table:table-cell office:value-type="string" calcext:value-type="string">
            <text:p>Desarrollo y prueba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8</text:p>
          </table:table-cell>
          <table:table-cell office:value-type="string" calcext:value-type="string">
            <text:p>Mantenimiento y soporte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calendario técnico de inicio de curs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9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odo dry-run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0</text:p>
          </table:table-cell>
          <table:table-cell office:value-type="string" calcext:value-type="string">
            <text:p>Plugin eXeLearning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prueba automática de conectividad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1</text:p>
          </table:table-cell>
          <table:table-cell office:value-type="string" calcext:value-type="string">
            <text:p>IA en Moodle</text:p>
          </table:table-cell>
          <table:table-cell office:value-type="string" calcext:value-type="string">
            <text:p>Propone procesos de IA síncronos, sin colas ni ejecución diferid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notificación por correo al docent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3</text:p>
          </table:table-cell>
          <table:table-cell office:value-type="string" calcext:value-type="string">
            <text:p>POC RAG por curs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4</text:p>
          </table:table-cell>
          <table:table-cell office:value-type="string" calcext:value-type="string">
            <text:p>Integración NIA alumn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NIA enmascarado cuando no sea necesario verlo complet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5</text:p>
          </table:table-cell>
          <table:table-cell office:value-type="string" calcext:value-type="string">
            <text:p>SSO en Moodle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SSO operativo desde la aplicación móvil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6</text:p>
          </table:table-cell>
          <table:table-cell office:value-type="string" calcext:value-type="string">
            <text:p>Plugin Kuet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prueba de carga específica para Kuet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7</text:p>
          </table:table-cell>
          <table:table-cell office:value-type="string" calcext:value-type="string">
            <text:p>Plugin Offline Quiz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odo de previsualización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8</text:p>
          </table:table-cell>
          <table:table-cell office:value-type="string" calcext:value-type="string">
            <text:p>Integración calificacione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simulación previa validar sin envia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9</text:p>
          </table:table-cell>
          <table:table-cell office:value-type="string" calcext:value-type="string">
            <text:p>Borrado de curs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estimación previa de impact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0</text:p>
          </table:table-cell>
          <table:table-cell office:value-type="string" calcext:value-type="string">
            <text:p>Moosh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1</text:p>
          </table:table-cell>
          <table:table-cell office:value-type="string" calcext:value-type="string">
            <text:p>Moodler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scopes de API por tipo de operación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ubtítulos multiidioma</text:p>
          </table:table-cell>
          <table:table-cell office:value-type="string" calcext:value-type="string">
            <text:p>Propone subtítulos con IA de cobertura limitada y con error sobre la base de dat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subtítulos multiidioma en búsquedas Elastic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Elastic en búsquedas</text:p>
          </table:table-cell>
          <table:table-cell office:value-type="string" calcext:value-type="string">
            <text:p>No contempla búsquedas sobre subtítulos ni define la arquitectura de indexació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modo explicación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3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limitación de comprobación de sesión activa en casos concreto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4</text:p>
          </table:table-cell>
          <table:table-cell office:value-type="string" calcext:value-type="string">
            <text:p>Scratch editor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guardado de versiones anteriores del proyect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5</text:p>
          </table:table-cell>
          <table:table-cell office:value-type="string" calcext:value-type="string">
            <text:p>eXeLearning 3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comprobación previa del ZIP e informe al usuari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6</text:p>
          </table:table-cell>
          <table:table-cell office:value-type="string" calcext:value-type="string">
            <text:p>Bajas de usuari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odo simulación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7</text:p>
          </table:table-cell>
          <table:table-cell office:value-type="string" calcext:value-type="string">
            <text:p>Subidas JPEG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validación ligera de extensiones admitidas en cl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8</text:p>
          </table:table-cell>
          <table:table-cell office:value-type="string" calcext:value-type="string">
            <text:p>Páginas de error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bloque qué puedo hacer ahor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9</text:p>
          </table:table-cell>
          <table:table-cell office:value-type="string" calcext:value-type="string">
            <text:p>Subtítulos en audi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transcripción multiidiom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10</text:p>
          </table:table-cell>
          <table:table-cell office:value-type="string" calcext:value-type="string">
            <text:p>IA en víde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indicador interno de confianz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desarrollada de forma general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11</text:p>
          </table:table-cell>
          <table:table-cell office:value-type="string" calcext:value-type="string">
            <text:p>Refactorización de códig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apa vivo de deuda técnic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2" office:value-type="string" calcext:value-type="string">
            <text:p>LDAP</text:p>
          </table:table-cell>
          <table:table-cell office:value-type="string" calcext:value-type="string">
            <text:p>Consultas LDAP</text:p>
          </table:table-cell>
          <table:table-cell office:value-type="string" calcext:value-type="string">
            <text:p>Interpreta erróneamente el LDAP plano como directorio alternativo, no como repositorio PostgreSQ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panel de contraseñas temporales activa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completa sobre seguridad e integración.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eLearning (EXE)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XeLearning Online</text:p>
          </table:table-cell>
          <table:table-cell office:value-type="string" calcext:value-type="string">
            <text:p>Menciona actualización y compatibilidad, sin detallar integración Moodle ni validación SCOR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plantilla DUA ligero y reproductor en Nextcloud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rreo web (COR)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Adaptación a última versión</text:p>
          </table:table-cell>
          <table:table-cell office:value-type="string" calcext:value-type="string">
            <text:p>Plantea mantenimiento y actualización, sin despliegue, pruebas ni arquitectura detallad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pantalla de diagnóstico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en la solución técnica y la planificación, sin desarroll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rreo web (COR)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IA en correoweb</text:p>
          </table:table-cell>
          <table:table-cell office:value-type="string" calcext:value-type="string">
            <text:p>Propone desarrollar IA desde cero sin considerar la solución xAI ya adaptada al entor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botón para informar de resúmenes incorrecto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de IA en correo,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1</text:p>
          </table:table-cell>
          <table:table-cell office:value-type="string" calcext:value-type="string">
            <text:p>Mantenimiento y actualización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: panel interno de versiones por component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2</text:p>
          </table:table-cell>
          <table:table-cell office:value-type="string" calcext:value-type="string">
            <text:p>Licencias de plugins/tema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aviso de licencias próximas a caducar o activa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3</text:p>
          </table:table-cell>
          <table:table-cell office:value-type="string" calcext:value-type="string">
            <text:p>Configuración WAF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: correlación entre eventos WAF y logs de WordPres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completa para WAF y seguridad.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4</text:p>
          </table:table-cell>
          <table:table-cell office:value-type="string" calcext:value-type="string">
            <text:p>Sustitución captcha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ejoras en captch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5</text:p>
          </table:table-cell>
          <table:table-cell office:value-type="string" calcext:value-type="string">
            <text:p>Integración SS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política individualizada de 2F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mpleta basada en un caso de uso operativo.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rmularios (FOR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rmulari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informe de salud de Formulario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MPieza (EMP)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Describe funciones y mantenimiento, sin arquitectura, identidad, sesiones ni control de acces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dashboard de salud de componente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scador de AV y curso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scador de aulas y curs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: detección de búsquedas frecuentes sin resultado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completa para optimizar búsquedas.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1</text:p>
          </table:table-cell>
          <table:table-cell office:value-type="string" calcext:value-type="string">
            <text:p>Wowza</text:p>
          </table:table-cell>
          <table:table-cell office:value-type="string" calcext:value-type="string">
            <text:p>Reconoce la integración de videoconferencia, sin definir protocolos ni autentic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recolector de métricas por emisión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2</text:p>
          </table:table-cell>
          <table:table-cell office:value-type="string" calcext:value-type="string">
            <text:p>Jitsi</text:p>
          </table:table-cell>
          <table:table-cell office:value-type="string" calcext:value-type="string">
            <text:p>No concreta escalabilidad, balanceo, dimensionamiento ni gestión de grabacion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regla de admisión progresiva para salas de invitado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3</text:p>
          </table:table-cell>
          <table:table-cell office:value-type="string" calcext:value-type="string">
            <text:p>BigBlueButton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aviso de caducidad de grabacione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4</text:p>
          </table:table-cell>
          <table:table-cell office:value-type="string" calcext:value-type="string">
            <text:p>PeerTube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plantilla de evento de alta audienci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imalandia (ANI)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imalandia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apa de deuda técnic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cronización de usuarios (SYN)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incronización de usuarios</text:p>
          </table:table-cell>
          <table:table-cell office:value-type="string" calcext:value-type="string">
            <text:p>Reitera una interpretación incorrecta del modelo de datos de sincronizació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con valor añadido: evolución hacia API de Raíce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rtal CAU (CAU)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Portal CAU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panel de verificación postactualización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2" office:value-type="string" calcext:value-type="string">
            <text:p>EducaSAAC (EDU)</text:p>
          </table:table-cell>
          <table:table-cell/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biblioteca interna ligera de seguridad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1</text:p>
          </table:table-cell>
          <table:table-cell office:value-type="string" calcext:value-type="string">
            <text:p>Evolución del servicio Cloud</text:p>
          </table:table-cell>
          <table:table-cell office:value-type="string" calcext:value-type="string">
            <text:p>Menciona actualización y mantenimiento, sin resolver sincronización, conflictos ni replic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2</text:p>
          </table:table-cell>
          <table:table-cell office:value-type="string" calcext:value-type="string">
            <text:p>IA en Cloud</text:p>
          </table:table-cell>
          <table:table-cell office:value-type="string" calcext:value-type="string">
            <text:p>Menciona edición colaborativa, sin explicar integración, concurrencia ni conflict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zón anónimo (BAN)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uzón anónimo</text:p>
          </table:table-cell>
          <table:table-cell office:value-type="string" calcext:value-type="string">
            <text:p>Caracteriza erróneamente el sistema como una aplicación Jav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incluida con desarrollo suficiente: panel de comprobación previ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2" office:value-type="string" calcext:value-type="string">
            <text:p>DTIC</text:p>
          </table:table-cell>
          <table:table-cell/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informe previo en HTML y CSV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uimientos (SEG)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imient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: panel de salud de edición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bor (ALB)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or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consola de revisión sin datos personale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mpleta con un caso de IA detallado.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visos (AVI)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isos</text:p>
          </table:table-cell>
          <table:table-cell office:value-type="string" calcext:value-type="string">
            <text:p>Caracteriza erróneamente Avisos como una aplicación Java y no define su integració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uesta técnica incluida con desarrollo suficiente: validación de seguridad previ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ros (FOROS)</text:p>
          </table:table-cell>
          <table:table-cell office:value-type="string" calcext:value-type="string">
            <text:p>FOROS</text:p>
          </table:table-cell>
          <table:table-cell office:value-type="string" calcext:value-type="string">
            <text:p>For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autenticación contra SS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oletines (BOL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etine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validación previa al enví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yuda (AYU)</text:p>
          </table:table-cell>
          <table:table-cell office:value-type="string" calcext:value-type="string">
            <text:p>AYU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rtal (POR)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: endpoint de validación previa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b estática (WES)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b estática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matriz de páginas crítica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ramework de interfaz (IFZ)</text:p>
          </table:table-cell>
          <table:table-cell office:value-type="string" calcext:value-type="string">
            <text:p>IFZ</text:p>
          </table:table-cell>
          <table:table-cell office:value-type="string" calcext:value-type="string">
            <text:p>Framework de interfaz</text:p>
          </table:table-cell>
          <table:table-cell office:value-type="string" calcext:value-type="string">
            <text:p>Propuesta técnica incluida, con desarrollo general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con valor añadido: catálogo vivo de componente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completa para el framework de interfaz.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ntornos MAX (MAX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ntornos MAX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stión de títulos (GES)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Gestión de títulos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validador previo de fichero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didas de uso web (USO)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Medidas de uso web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: Rybbit integrado con SSO y script de despliegu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1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agregada para Wekan, con desarrollo técnico deficiente por subproyecto; incluye backup y rollback probad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2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agregada para Wekan, con desarrollo técnico deficiente por subproyecto; incluye backup y rollback probad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3</text:p>
          </table:table-cell>
          <table:table-cell office:value-type="string" calcext:value-type="string">
            <text:p>Configuración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agregada para Wekan, con desarrollo técnico deficiente por subproyecto; incluye backup y rollback probad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4</text:p>
          </table:table-cell>
          <table:table-cell office:value-type="string" calcext:value-type="string">
            <text:p>Interfaz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agregada para Wekan, con desarrollo técnico deficiente por subproyecto; incluye backup y rollback probado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diente de desarrollo en el documento.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ood (MAM)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mood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: orquestador ligero de scripts por VPN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MLab (EML)</text:p>
          </table:table-cell>
          <table:table-cell office:value-type="string" calcext:value-type="string">
            <text:p>EML</text:p>
          </table:table-cell>
          <table:table-cell office:value-type="string" calcext:value-type="string">
            <text:p>EMLab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con valor añadido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iesWeb (ABI)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AbiesWeb</text:p>
          </table:table-cell>
          <table:table-cell office:value-type="string" calcext:value-type="string">
            <text:p>Propuesta incluida, pero con desarrollo técnico insuficien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esta técnica incluida con desarrollo suficient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ón sin desarrollo técnico completo.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reas_anexoii_desarrollo.A1:tareas_anexoii_desarrollo.XFD1048576">
            <calcext:color-scale>
              <calcext:color-scale-entry calcext:value="1" calcext:type="number" calcext:color="#ff3838"/>
              <calcext:color-scale-entry calcext:value="50" calcext:type="percentile" calcext:color="#ffff38"/>
              <calcext:color-scale-entry calcext:value="10" calcext:type="number" calcext:color="#3faf4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1T18:26:06.790015040</dc:date>
    <meta:editing-duration>PT12M14S</meta:editing-duration>
    <meta:editing-cycles>2</meta:editing-cycles>
    <meta:generator>LibreOffice/26.2.4.2$Linux_X86_64 LibreOffice_project/3346a99e6b841765b75a9b29714a5b95c6761ce3</meta:generator>
    <meta:document-statistic meta:table-count="1" meta:cell-count="745" meta:object-count="0"/>
  </office:meta>
</office:document-meta>
</file>